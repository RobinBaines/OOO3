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080000026EA550E032.png" manifest:media-type="image/png"/>
  <manifest:file-entry manifest:full-path="Pictures/1000000000000E38000005C17ED1E482.png" manifest:media-type="image/png"/>
  <manifest:file-entry manifest:full-path="Pictures/1000000000000537000002DFA89B43D3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fill="none" loext:fill-use-slide-background="false" draw:textarea-horizontal-align="justify" draw:textarea-vertical-align="middle" draw:auto-grow-height="false" fo:min-height="0.676cm" fo:min-width="2.742cm" fo:wrap-option="wrap" style:writing-mode="lr-tb" loext:decorative="false"/>
      <style:paragraph-properties style:writing-mode="lr-tb"/>
    </style:style>
    <style:style style:name="gr3" style:family="graphic" style:parent-style-name="standard">
      <style:graphic-properties draw:fill="none" loext:fill-use-slide-background="false" draw:textarea-horizontal-align="justify" draw:textarea-vertical-align="middle" draw:auto-grow-height="false" fo:min-height="0.676cm" fo:min-width="5.207cm" fo:wrap-option="wrap" style:writing-mode="lr-tb" loext:decorative="false"/>
      <style:paragraph-properties style:writing-mode="lr-tb"/>
    </style:style>
    <style:style style:name="gr4" style:family="graphic" style:parent-style-name="standard">
      <style:graphic-properties draw:fill="none" loext:fill-use-slide-background="false" draw:textarea-horizontal-align="justify" draw:textarea-vertical-align="middle" draw:auto-grow-height="false" fo:min-height="0.214cm" fo:min-width="2.278cm" fo:wrap-option="wrap" style:writing-mode="lr-tb" loext:decorative="false"/>
      <style:paragraph-properties style:writing-mode="lr-tb"/>
    </style:style>
    <style:style style:name="gr5" style:family="graphic" style:parent-style-name="standard">
      <style:graphic-properties draw:fill="none" loext:fill-use-slide-background="false" draw:textarea-horizontal-align="justify" draw:textarea-vertical-align="middle" draw:auto-grow-height="false" fo:min-height="0.141cm" fo:min-width="2.211cm" fo:wrap-option="wrap" style:writing-mode="lr-tb" loext:decorative="false"/>
      <style:paragraph-properties style:writing-mode="lr-tb"/>
    </style:style>
    <style:style style:name="gr6" style:family="graphic" style:parent-style-name="standard">
      <style:graphic-properties draw:stroke="none" draw:fill="none" draw:fill-color="#ffffff" draw:auto-grow-width="true" fo:min-height="0.712cm" fo:min-width="13.509cm" loext:decorative="false"/>
      <style:paragraph-properties style:writing-mode="lr-tb"/>
    </style:style>
    <style:style style:name="gr7" style:family="graphic">
      <style:graphic-properties style:protect="size" loext:decorative="false"/>
    </style:style>
    <style:style style:name="gr8" style:family="graphic" style:parent-style-name="standard">
      <style:graphic-properties draw:fill="none" loext:fill-use-slide-background="false" draw:textarea-horizontal-align="justify" draw:textarea-vertical-align="middle" draw:auto-grow-height="false" fo:min-height="0.523cm" fo:min-width="3.294cm" fo:wrap-option="wrap" style:writing-mode="lr-tb" loext:decorative="false"/>
      <style:paragraph-properties style:writing-mode="lr-tb"/>
    </style:style>
    <style:style style:name="gr9" style:family="graphic" style:parent-style-name="standard">
      <style:graphic-properties draw:fill="none" loext:fill-use-slide-background="false" draw:textarea-horizontal-align="justify" draw:textarea-vertical-align="middle" draw:auto-grow-height="false" fo:min-height="0.522cm" fo:min-width="6.664cm" fo:wrap-option="wrap" style:writing-mode="lr-tb" loext:decorative="false"/>
      <style:paragraph-properties style:writing-mode="lr-tb"/>
    </style:style>
    <style:style style:name="gr10" style:family="graphic" style:parent-style-name="standard">
      <style:graphic-properties draw:fill="none" loext:fill-use-slide-background="false" draw:textarea-horizontal-align="justify" draw:textarea-vertical-align="middle" draw:auto-grow-height="false" fo:min-height="0.522cm" fo:min-width="3.294cm" fo:wrap-option="wrap" style:writing-mode="lr-tb" loext:decorative="false"/>
      <style:paragraph-properties style:writing-mode="lr-tb"/>
    </style:style>
    <style:style style:name="gr11" style:family="graphic" style:parent-style-name="standard">
      <style:graphic-properties draw:fill="none" loext:fill-use-slide-background="false" draw:textarea-horizontal-align="justify" draw:textarea-vertical-align="middle" draw:auto-grow-height="false" fo:min-height="1.14cm" fo:min-width="4.13cm" fo:wrap-option="wrap" style:writing-mode="lr-tb" loext:decorative="false"/>
      <style:paragraph-properties style:writing-mode="lr-tb"/>
    </style:style>
    <style:style style:name="gr12" style:family="graphic" style:parent-style-name="objectwithoutfill">
      <style:graphic-properties draw:marker-end="Arrowheads_20_1" draw:marker-end-width="0.3cm" draw:fill="none" draw:textarea-vertical-align="middle" loext:decorative="false"/>
    </style:style>
    <style:style style:name="gr13" style:family="graphic" style:parent-style-name="objectwithoutfill">
      <style:graphic-properties draw:fill="none" draw:textarea-vertical-align="middle" loext:decorative="false"/>
    </style:style>
    <style:style style:name="gr14" style:family="graphic" style:parent-style-name="standard">
      <style:graphic-properties draw:textarea-horizontal-align="justify" draw:textarea-vertical-align="middle" draw:auto-grow-height="false" fo:min-height="0.104cm" fo:min-width="0.066cm" loext:decorative="false"/>
    </style:style>
    <style:style style:name="gr15" style:family="graphic" style:parent-style-name="standard">
      <style:graphic-properties draw:textarea-horizontal-align="justify" draw:textarea-vertical-align="middle" draw:auto-grow-height="false" fo:min-height="0.457cm" fo:min-width="0.349cm" loext:decorative="false"/>
    </style:style>
    <style:style style:name="gr16" style:family="graphic" style:parent-style-name="standard">
      <style:graphic-properties draw:fill-color="#ffffff" draw:textarea-horizontal-align="justify" draw:textarea-vertical-align="middle" draw:auto-grow-height="false" fo:min-height="0.104cm" fo:min-width="0.066cm" loext:decorative="false"/>
    </style:style>
    <style:style style:name="gr17" style:family="graphic" style:parent-style-name="standard">
      <style:graphic-properties draw:textarea-vertical-align="middle" loext:decorative="false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19" style:family="graphic" style:parent-style-name="standard">
      <style:graphic-properties draw:fill-color="#b3cac7" draw:textarea-vertical-align="middle" loext:decorative="false"/>
    </style:style>
    <style:style style:name="gr20" style:family="graphic" style:parent-style-name="standard">
      <style:graphic-properties draw:fill-color="#dedce6" draw:textarea-vertical-align="middle" loext:decorative="false"/>
    </style:style>
    <style:style style:name="gr21" style:family="graphic" style:parent-style-name="standard">
      <style:graphic-properties draw:textarea-horizontal-align="justify" draw:textarea-vertical-align="middle" draw:auto-grow-height="false" fo:min-height="0.104cm" fo:min-width="0.068cm" loext:decorative="false"/>
    </style:style>
    <style:style style:name="pr1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  <style:text-properties fo:font-size="10pt"/>
    </style:style>
    <style:style style:name="P3" style:family="paragraph">
      <loext:graphic-properties draw:fill="none"/>
      <style:paragraph-properties fo:text-align="center" style:writing-mode="lr-tb"/>
      <style:text-properties fo:font-size="10pt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  <style:paragraph-properties fo:text-align="center"/>
    </style:style>
    <style:style style:name="P8" style:family="paragraph">
      <loext:graphic-properties draw:fill-color="#ffffff"/>
    </style:style>
    <style:style style:name="P9" style:family="paragraph">
      <loext:graphic-properties draw:fill-color="#b3cac7"/>
      <style:paragraph-properties fo:text-align="center"/>
    </style:style>
    <style:style style:name="P10" style:family="paragraph">
      <loext:graphic-properties draw:fill-color="#dedce6"/>
      <style:paragraph-properties fo:text-align="center"/>
    </style:style>
    <style:style style:name="T1" style:family="text">
      <style:text-properties fo:font-size="1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draw:style-name="gr1" draw:text-style-name="P1" draw:layer="layout" svg:width="26.632cm" svg:height="10.776cm" svg:x="0.5cm" svg:y="2.824cm">
          <draw:image xlink:href="Pictures/1000000000000E38000005C17ED1E482.png" xlink:type="simple" xlink:show="embed" xlink:actuate="onLoad" draw:mime-type="image/png">
            <text:p/>
          </draw:image>
        </draw:frame>
        <draw:custom-shape draw:style-name="gr2" draw:text-style-name="P3" draw:layer="layout" svg:width="3.5cm" svg:height="1cm" svg:x="5.9cm" svg:y="1.6cm">
          <text:p text:style-name="P2"><text:span text:style-name="T1">Run the script.</text:span></text:p>
          <draw:enhanced-geometry svg:viewBox="0 0 21600 21600" draw:text-areas="800 800 20800 20800" draw:type="round-rectangular-callout" draw:modifiers="-13252.442159383 31396.603396603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3" draw:layer="layout" svg:width="3.5cm" svg:height="1cm" svg:x="19.6cm" svg:y="1.9cm">
          <text:p text:style-name="P2"><text:span text:style-name="T1">Air comes to rest.</text:span></text:p>
          <draw:enhanced-geometry svg:viewBox="0 0 21600 21600" draw:text-areas="800 800 20800 20800" draw:type="round-rectangular-callout" draw:modifiers="-8298.20051413882 43372.627372627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3" draw:layer="layout" svg:width="3.5cm" svg:height="1cm" svg:x="23.2cm" svg:y="2cm">
          <text:p text:style-name="P2"><text:span text:style-name="T1">Water comes to rest.</text:span></text:p>
          <draw:enhanced-geometry svg:viewBox="0 0 21600 21600" draw:text-areas="800 800 20800 20800" draw:type="round-rectangular-callout" draw:modifiers="8526.47814910026 98807.592407592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3" draw:layer="layout" svg:width="3.5cm" svg:height="1cm" svg:x="22.5cm" svg:y="12.6cm">
          <text:p text:style-name="P2"><text:span text:style-name="T1">Stone at bottom of the pool.</text:span></text:p>
          <draw:enhanced-geometry svg:viewBox="0 0 21600 21600" draw:text-areas="800 800 20800 20800" draw:type="round-rectangular-callout" draw:modifiers="4016.45244215938 -43955.244755244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3" draw:layer="layout" svg:width="6.163cm" svg:height="1cm" svg:x="11.337cm" svg:y="1.8cm">
          <text:p text:style-name="P2"><text:span text:style-name="T1">Hide object connections to simplify the presentation.</text:span></text:p>
          <draw:enhanced-geometry svg:viewBox="0 0 21600 21600" draw:text-areas="800 800 20800 20800" draw:type="round-rectangular-callout" draw:modifiers="-10982.2193380921 27339.860139860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3" draw:layer="layout" svg:width="3cm" svg:height="0.5cm" svg:x="9.5cm" svg:y="8cm">
          <text:p text:style-name="P2"><text:span text:style-name="T1">An Event </text:span></text:p>
          <draw:enhanced-geometry svg:viewBox="0 0 21600 21600" draw:text-areas="800 800 20800 20800" draw:type="round-rectangular-callout" draw:modifiers="-18778.5404865045 -197633.53293413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3" draw:layer="layout" svg:width="2.927cm" svg:height="0.421cm" svg:x="9.573cm" svg:y="9.679cm">
          <text:p text:style-name="P2"><text:span text:style-name="T1">with INPUT</text:span></text:p>
          <draw:enhanced-geometry svg:viewBox="0 0 21600 21600" draw:text-areas="800 800 20800 20800" draw:type="round-rectangular-callout" draw:modifiers="-27759.8360655738 -289143.12796208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3" draw:layer="layout" svg:width="2.927cm" svg:height="0.421cm" svg:x="9.592cm" svg:y="10.955cm">
          <text:p text:style-name="P2"><text:span text:style-name="T1">with OUTPUT</text:span></text:p>
          <draw:enhanced-geometry svg:viewBox="0 0 21600 21600" draw:text-areas="800 800 20800 20800" draw:type="round-rectangular-callout" draw:modifiers="-26040.9836065574 -192557.34597156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6" draw:text-style-name="P4" draw:layer="layout" svg:width="14.009cm" svg:height="0.962cm" svg:x="6.991cm" svg:y="0.413cm">
          <draw:text-box>
            <text:p>WOOOF output: PoolAndStone.txt</text:p>
          </draw:text-box>
        </draw:frame>
        <presentation:notes draw:style-name="dp2">
          <draw:page-thumbnail draw:style-name="gr7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draw:style-name="gr1" draw:text-style-name="P1" draw:layer="layout" svg:width="18.653cm" svg:height="9.388cm" svg:x="4.5cm" svg:y="5.312cm">
          <draw:image xlink:href="Pictures/1000000000000537000002DFA89B43D3.png" xlink:type="simple" xlink:show="embed" xlink:actuate="onLoad" draw:mime-type="image/png">
            <text:p/>
          </draw:image>
        </draw:frame>
        <draw:custom-shape draw:style-name="gr8" draw:text-style-name="P3" draw:layer="layout" svg:width="4.096cm" svg:height="0.833cm" svg:x="2.329cm" svg:y="3.066cm">
          <text:p text:style-name="P2"><text:span text:style-name="T1">Select a script.</text:span></text:p>
          <draw:enhanced-geometry svg:viewBox="0 0 21600 21600" draw:text-areas="800 800 20800 20800" draw:type="round-rectangular-callout" draw:modifiers="14856.9196973395 71378.417266187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" draw:text-style-name="P1" draw:layer="layout" svg:width="8.516cm" svg:height="6.241cm" svg:x="5.577cm" svg:y="6.379cm">
          <draw:image xlink:href="Pictures/10000000000003080000026EA550E032.png" xlink:type="simple" xlink:show="embed" xlink:actuate="onLoad" draw:mime-type="image/png">
            <text:p/>
          </draw:image>
        </draw:frame>
        <draw:custom-shape draw:style-name="gr9" draw:text-style-name="P3" draw:layer="layout" svg:width="7.736cm" svg:height="0.832cm" svg:x="12.183cm" svg:y="3.1cm">
          <text:p text:style-name="P2"><text:span text:style-name="T1">Adjust the speed of the processing in msecs.</text:span></text:p>
          <draw:enhanced-geometry svg:viewBox="0 0 21600 21600" draw:text-areas="800 800 20800 20800" draw:type="round-rectangular-callout" draw:modifiers="2585.18805738658 72112.364945978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3" draw:layer="layout" svg:width="4.096cm" svg:height="0.832cm" svg:x="6.496cm" svg:y="3.099cm">
          <text:p text:style-name="P2"><text:span text:style-name="T1">Selected script.</text:span></text:p>
          <draw:enhanced-geometry svg:viewBox="0 0 21600 21600" draw:text-areas="800 800 20800 20800" draw:type="round-rectangular-callout" draw:modifiers="6205.3209665609 69337.815126050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3" draw:layer="layout" svg:width="4.096cm" svg:height="0.832cm" svg:x="15.422cm" svg:y="4.299cm">
          <text:p text:style-name="P2"><text:span text:style-name="T1">Adjust Object text size.</text:span></text:p>
          <draw:enhanced-geometry svg:viewBox="0 0 21600 21600" draw:text-areas="800 800 20800 20800" draw:type="round-rectangular-callout" draw:modifiers="991.16426653649 39777.190876350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1" draw:text-style-name="P3" draw:layer="layout" svg:width="5cm" svg:height="1.5cm" svg:x="18cm" svg:y="7cm">
          <text:p text:style-name="P2"><text:span text:style-name="T1">Adjust Property/Quality text size.</text:span></text:p>
          <draw:enhanced-geometry svg:viewBox="0 0 21600 21600" draw:text-areas="800 800 20800 20800" draw:type="round-rectangular-callout" draw:modifiers="-246.19076184763 -12447.701532311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6" draw:text-style-name="P4" draw:layer="layout" svg:width="14.009cm" svg:height="0.962cm" svg:x="7cm" svg:y="1.038cm">
          <draw:text-box>
            <text:p>WOOOF interface instructions. </text:p>
          </draw:text-box>
        </draw:frame>
        <draw:custom-shape draw:style-name="gr10" draw:text-style-name="P3" draw:layer="layout" svg:width="4.096cm" svg:height="0.832cm" svg:x="8.997cm" svg:y="4.076cm">
          <text:p text:style-name="P2"><text:span text:style-name="T1">Run the script.</text:span></text:p>
          <draw:enhanced-geometry svg:viewBox="0 0 21600 21600" draw:text-areas="800 800 20800 20800" draw:type="round-rectangular-callout" draw:modifiers="8614.6936783012 45870.828331332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3" draw:layer="layout" svg:width="6.163cm" svg:height="1cm" svg:x="19.5cm" svg:y="2cm">
          <text:p text:style-name="P2"><text:span text:style-name="T1">Hide object connections to simplify the presentation.</text:span></text:p>
          <draw:enhanced-geometry svg:viewBox="0 0 21600 21600" draw:text-areas="800 800 20800 20800" draw:type="round-rectangular-callout" draw:modifiers="-2375.85983127839 84781.618381618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7" draw:layer="layout" svg:width="19.798cm" svg:height="11.136cm" svg:x="0.6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line draw:style-name="gr12" draw:text-style-name="P1" draw:layer="layout" svg:x1="2cm" svg:y1="5.5cm" svg:x2="25.5cm" svg:y2="5.5cm">
          <text:p/>
        </draw:line>
        <draw:line draw:style-name="gr13" draw:text-style-name="P1" draw:layer="layout" svg:x1="4.6cm" svg:y1="5.5cm" svg:x2="4.6cm" svg:y2="1.5cm">
          <text:p/>
        </draw:line>
        <draw:line draw:style-name="gr13" draw:text-style-name="P1" draw:layer="layout" svg:x1="9.2cm" svg:y1="5.5cm" svg:x2="9.2cm" svg:y2="1.5cm">
          <text:p/>
        </draw:line>
        <draw:line draw:style-name="gr13" draw:text-style-name="P1" draw:layer="layout" svg:x1="17.7cm" svg:y1="5.5cm" svg:x2="17.7cm" svg:y2="1.5cm">
          <text:p/>
        </draw:line>
        <draw:custom-shape draw:style-name="gr14" draw:text-style-name="P6" draw:layer="layout" svg:width="0.8cm" svg:height="0.5cm" svg:x="4.2cm" svg:y="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6" draw:layer="layout" svg:width="0.8cm" svg:height="0.5cm" svg:x="4.201cm" svg:y="4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6" draw:layer="layout" svg:width="0.8cm" svg:height="0.5cm" svg:x="8.801cm" svg:y="2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6" draw:layer="layout" svg:width="0.8cm" svg:height="0.5cm" svg:x="8.801cm" svg:y="3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6" draw:layer="layout" svg:width="1.199cm" svg:height="0.999cm" svg:x="12.501cm" svg:y="2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6" draw:layer="layout" svg:width="0.8cm" svg:height="0.5cm" svg:x="17.302cm" svg:y="2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6" draw:layer="layout" svg:width="0.8cm" svg:height="0.5cm" svg:x="17.302cm" svg:y="3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6" draw:layer="layout" svg:width="0.8cm" svg:height="0.5cm" svg:x="21.501cm" svg:y="2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6" draw:layer="layout" svg:width="0.8cm" svg:height="0.5cm" svg:x="21.502cm" svg:y="3.9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6" draw:layer="layout" svg:width="0.8cm" svg:height="0.5cm" svg:x="15.203cm" svg:y="2.8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6" draw:layer="layout" svg:width="0.8cm" svg:height="0.5cm" svg:x="15.203cm" svg:y="3.2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1" draw:layer="layout" svg:x1="2cm" svg:y1="13.275cm" svg:x2="25.5cm" svg:y2="13.275cm">
          <text:p/>
        </draw:line>
        <draw:line draw:style-name="gr13" draw:text-style-name="P1" draw:layer="layout" svg:x1="4.6cm" svg:y1="13.275cm" svg:x2="4.6cm" svg:y2="9.275cm">
          <text:p/>
        </draw:line>
        <draw:line draw:style-name="gr13" draw:text-style-name="P1" draw:layer="layout" svg:x1="9.2cm" svg:y1="13.275cm" svg:x2="9.2cm" svg:y2="9.275cm">
          <text:p/>
        </draw:line>
        <draw:line draw:style-name="gr13" draw:text-style-name="P1" draw:layer="layout" svg:x1="17.7cm" svg:y1="13.275cm" svg:x2="17.7cm" svg:y2="9.275cm">
          <text:p/>
        </draw:line>
        <draw:custom-shape draw:style-name="gr16" draw:text-style-name="P7" draw:layer="layout" svg:width="0.8cm" svg:height="0.5cm" svg:x="4.2cm" svg:y="12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7" draw:text-style-name="P6" draw:layer="layout" svg:width="0.999cm" svg:height="1cm" draw:transform="rotate (-1.60640104353558) translate (3.46859022841345cm 12.1689323989333cm)" svg:viewBox="0 0 1000 1001" svg:d="M1000 0c0 2252-1000 0-1000 0z">
          <text:p/>
        </draw:path>
        <draw:custom-shape draw:style-name="gr16" draw:text-style-name="P7" draw:layer="layout" svg:width="0.8cm" svg:height="0.5cm" svg:x="8.801cm" svg:y="12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7" draw:text-style-name="P6" draw:layer="layout" svg:width="0.999cm" svg:height="1cm" draw:transform="rotate (-1.48963851657716) translate (8.73770006016312cm 12.1295622982246cm)" svg:viewBox="0 0 1000 1001" svg:d="M1000 0c0 2252-1000 0-1000 0z">
          <text:p/>
        </draw:path>
        <draw:custom-shape draw:style-name="gr16" draw:text-style-name="P7" draw:layer="layout" svg:width="0.8cm" svg:height="0.5cm" svg:x="14.102cm" svg:y="12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7" draw:text-style-name="P6" draw:layer="layout" svg:width="0.999cm" svg:height="1cm" draw:transform="rotate (-1.48963851657716) translate (14.1017000601631cm 12.1075622982246cm)" svg:viewBox="0 0 1000 1001" svg:d="M1000 0c0 2252-1000 0-1000 0z">
          <text:p/>
        </draw:path>
        <draw:custom-shape draw:style-name="gr16" draw:text-style-name="P7" draw:layer="layout" svg:width="0.8cm" svg:height="0.5cm" svg:x="17.302cm" svg:y="12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7" draw:text-style-name="P6" draw:layer="layout" svg:width="0.999cm" svg:height="1cm" draw:transform="rotate (-1.48963851657716) translate (17.2377000601631cm 12.1075622982246cm)" svg:viewBox="0 0 1000 1001" svg:d="M1000 0c0 2252-1000 0-1000 0z">
          <text:p/>
        </draw:path>
        <draw:custom-shape draw:style-name="gr16" draw:text-style-name="P7" draw:layer="layout" svg:width="0.8cm" svg:height="0.5cm" svg:x="23.002cm" svg:y="11.1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7" draw:text-style-name="P6" draw:layer="layout" svg:width="0.999cm" svg:height="1cm" draw:transform="rotate (-1.48963851657716) translate (21.7017000601631cm 11.5075622982246cm)" svg:viewBox="0 0 1000 1001" svg:d="M1000 0c0 2252-1000 0-1000 0z">
          <text:p/>
        </draw:path>
        <draw:frame draw:style-name="gr18" draw:text-style-name="P4" draw:layer="layout" svg:width="5cm" svg:height="1cm" svg:x="10.5cm" svg:y="6.5cm">
          <draw:text-box>
            <text:p>drops.txt</text:p>
          </draw:text-box>
        </draw:frame>
        <draw:frame draw:style-name="gr18" draw:text-style-name="P4" draw:layer="layout" svg:width="4.5cm" svg:height="1cm" svg:x="10.5cm" svg:y="13.5cm">
          <draw:text-box>
            <text:p>golf.txt</text:p>
          </draw:text-box>
        </draw:frame>
        <presentation:notes draw:style-name="dp2">
          <draw:page-thumbnail draw:style-name="gr7" draw:layer="layout" svg:width="19.798cm" svg:height="11.136cm" svg:x="0.6cm" svg:y="2.257cm" draw:page-number="3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path draw:style-name="gr19" draw:text-style-name="P9" draw:layer="layout" svg:width="1.503cm" svg:height="2.599cm" svg:x="19.596cm" svg:y="8.5cm" svg:viewBox="0 0 1504 2600" svg:d="M75 869c-30 149-200 282 101 449 183 102-225 311-80 464 147 155 185 262 180 464-9 320 232 122 381 269 265 263 496-159 442-299-117-302 223-133 60-464-97-197 132-334 301-494 163-153-175-318-161-479 23-261-246-293-381-449-106-123 87-449-301-284l-39-46z">
          <text:p/>
        </draw:path>
        <draw:line draw:style-name="gr12" draw:text-style-name="P1" draw:layer="layout" svg:x1="2cm" svg:y1="7.4cm" svg:x2="27cm" svg:y2="7.4cm">
          <text:p/>
        </draw:line>
        <draw:path draw:style-name="gr20" draw:text-style-name="P10" draw:layer="layout" svg:width="1.739cm" svg:height="4.524cm" svg:x="8.296cm" svg:y="2.9cm" svg:viewBox="0 0 1740 4525" svg:d="M87 1512c-35 260-232 491 116 782 212 178-260 541-92 807 170 271 214 456 208 807-10 557 269 213 441 470 306 458 574-278 511-521-134-526 258-232 70-807-112-344 152-583 348-860 188-266-202-555-186-834 26-455-285-510-441-782-123-213 100-782-348-495l-46-78z">
          <text:p/>
        </draw:path>
        <draw:path draw:style-name="gr20" draw:text-style-name="P10" draw:layer="layout" svg:width="1.739cm" svg:height="4.824cm" svg:x="11.396cm" svg:y="2.5cm" svg:viewBox="0 0 1740 4825" svg:d="M87 1612c-35 278-232 523 116 834 212 190-260 577-92 861 170 288 214 486 208 861-10 593 269 226 441 500 306 488 574-296 511-556-134-560 258-247 70-860-112-366 152-621 348-917 188-284-202-591-186-889 26-485-285-544-441-833-123-228 100-835-348-528l-46-84z">
          <text:p/>
        </draw:path>
        <draw:path draw:style-name="gr19" draw:text-style-name="P9" draw:layer="layout" svg:width="1.503cm" svg:height="0.401cm" svg:x="11.596cm" svg:y="7.3cm" svg:viewBox="0 0 1504 402" svg:d="M75 134c-30 23-200 44 101 70 183 16-225 48-80 72 147 24 185 40 180 71-9 50 232 19 381 42 265 41 496-25 442-46-117-47 223-21 60-72-97-31 132-52 301-76 163-24-175-50-161-75 23-40-246-45-381-69-106-19 87-69-301-44l-39-7z">
          <text:p/>
        </draw:path>
        <draw:custom-shape draw:style-name="gr21" draw:text-style-name="P6" draw:layer="layout" svg:width="0.802cm" svg:height="0.5cm" svg:x="11.9cm" svg:y="7.2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1" draw:layer="layout" svg:x1="2cm" svg:y1="11.5cm" svg:x2="27cm" svg:y2="11.5cm">
          <text:p/>
        </draw:line>
        <draw:path draw:style-name="gr19" draw:text-style-name="P9" draw:layer="layout" svg:width="1.503cm" svg:height="1.099cm" svg:x="16.996cm" svg:y="7.4cm" svg:viewBox="0 0 1504 1100" svg:d="M75 368c-30 63-200 119 101 190 183 43-225 131-80 196 147 66 185 111 180 196-9 135 232 52 381 114 265 111 496-67 442-126-117-128 223-57 60-197-97-83 132-141 301-209 163-64-175-134-161-202 23-111-246-124-381-190-106-52 87-191-301-121l-39-19z">
          <text:p/>
        </draw:path>
        <draw:custom-shape draw:style-name="gr21" draw:text-style-name="P6" draw:layer="layout" svg:width="0.802cm" svg:height="0.5cm" svg:x="17.302cm" svg:y="7.9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1" draw:layer="layout" svg:x1="20.3cm" svg:y1="11.5cm" svg:x2="20.3cm" svg:y2="7.9cm">
          <text:p/>
        </draw:line>
        <draw:custom-shape draw:style-name="gr21" draw:text-style-name="P6" draw:layer="layout" svg:width="0.802cm" svg:height="0.5cm" svg:x="19.902cm" svg:y="11.0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0" draw:text-style-name="P10" draw:layer="layout" svg:width="1.739cm" svg:height="4.03cm" svg:x="3.596cm" svg:y="2.193cm" svg:viewBox="0 0 1740 4031" svg:d="M87 1347c-35 232-232 437 116 697 212 158-260 482-92 719 170 241 214 406 208 719-10 496 269 189 441 418 306 408 574-247 511-464-134-468 258-207 70-719-112-306 152-519 348-766 188-237-202-494-186-743 26-405-285-454-441-696-123-190 100-697-348-441l-46-70z">
          <text:p/>
        </draw:path>
        <draw:path draw:style-name="gr20" draw:text-style-name="P10" draw:layer="layout" svg:width="1.739cm" svg:height="4.325cm" svg:x="14.096cm" svg:y="3cm" svg:viewBox="0 0 1740 4326" svg:d="M87 1445c-35 249-232 469 116 748 212 170-260 517-92 772 170 258 214 436 208 772-10 532 269 202 441 448 306 438 574-265 511-498-134-502 258-222 70-771-112-329 152-557 348-822 188-255-202-531-186-798 26-435-285-487-441-747-123-204 100-748-348-473l-46-75z">
          <text:p/>
        </draw:path>
        <draw:path draw:style-name="gr20" draw:text-style-name="P10" draw:layer="layout" svg:width="1.739cm" svg:height="3.224cm" svg:x="16.896cm" svg:y="4cm" svg:viewBox="0 0 1740 3225" svg:d="M87 1078c-35 185-232 350 116 558 212 126-260 385-92 575 170 193 214 325 208 575-10 397 269 152 441 335 306 326 574-198 511-371-134-375 258-166 70-576-112-245 152-415 348-613 188-189-202-395-186-594 26-325-285-364-441-557-123-153 100-558-348-353l-46-56z">
          <text:p/>
        </draw:path>
        <draw:line draw:style-name="gr13" draw:text-style-name="P1" draw:layer="layout" svg:x1="23.8cm" svg:y1="7.4cm" svg:x2="23.8cm" svg:y2="3.4cm">
          <text:p/>
        </draw:line>
        <draw:path draw:style-name="gr20" draw:text-style-name="P10" draw:layer="layout" svg:width="0.903cm" svg:height="2.225cm" svg:x="20.996cm" svg:y="5cm" svg:viewBox="0 0 904 2226" svg:d="M45 744c-18 128-120 241 61 385 110 87-135 266-48 397 88 133 111 224 108 397-5 274 140 104 229 231 159 225 298-137 265-257-70-258 134-114 37-397-58-169 79-286 181-423 97-131-105-273-97-410 13-224-148-251-229-384-64-105 52-385-181-244l-24-39z">
          <text:p/>
        </draw:path>
        <draw:path draw:style-name="gr20" draw:text-style-name="P10" draw:layer="layout" svg:width="0.903cm" svg:height="0.499cm" svg:x="22.596cm" svg:y="5.9cm" svg:viewBox="0 0 904 500" svg:d="M45 167c-18 29-120 54 61 87 110 19-135 59-48 89 88 30 111 50 108 89-5 61 140 23 229 52 159 50 298-31 265-58-70-58 134-26 37-89-58-38 79-64 181-95 97-29-105-61-97-92 13-50-148-57-229-87-64-23 52-86-181-54l-24-9z">
          <text:p/>
        </draw:path>
        <draw:path draw:style-name="gr20" draw:text-style-name="P10" draw:layer="layout" svg:width="0.199cm" svg:height="0.099cm" svg:x="23.7cm" svg:y="5.9cm" svg:viewBox="0 0 200 100" svg:d="M10 33c-4 6-27 11 13 18 25 4-29 12-10 18s24 10 24 17c-1 13 31 5 50 11 36 10 66-6 59-12-15-11 30-5 8-18-13-7 18-12 40-19 22-5-23-12-21-18 3-10-33-11-51-17-14-5 12-18-40-11l-5-2z">
          <text:p/>
        </draw:path>
        <draw:line draw:style-name="gr13" draw:text-style-name="P1" draw:layer="layout" svg:x1="15.1cm" svg:y1="11.5cm" svg:x2="15.1cm" svg:y2="4.5cm">
          <text:p/>
        </draw:line>
        <draw:path draw:style-name="gr19" draw:text-style-name="P9" draw:layer="layout" svg:width="1.503cm" svg:height="0.699cm" svg:x="14.296cm" svg:y="7.3cm" svg:viewBox="0 0 1504 700" svg:d="M75 234c-30 40-200 76 101 121 183 27-225 84-80 125 147 42 185 70 180 125-9 86 232 32 381 72 265 71 496-43 442-80-117-82 223-36 60-125-97-53 132-90 301-133 163-41-175-86-161-129 23-71-246-79-381-121-106-33 87-121-301-77l-39-12z">
          <text:p/>
        </draw:path>
        <draw:custom-shape draw:style-name="gr21" draw:text-style-name="P6" draw:layer="layout" svg:width="0.802cm" svg:height="0.5cm" svg:x="14.701cm" svg:y="7.4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1" draw:layer="layout" svg:x1="9.2cm" svg:y1="11.5cm" svg:x2="9.2cm" svg:y2="4.5cm">
          <text:p/>
        </draw:line>
        <draw:custom-shape draw:style-name="gr14" draw:text-style-name="P6" draw:layer="layout" svg:width="0.8cm" svg:height="0.5cm" svg:x="8.801cm" svg:y="6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1" draw:layer="layout" svg:x1="4.6cm" svg:y1="11.5cm" svg:x2="4.6cm" svg:y2="4.5cm">
          <text:p/>
        </draw:line>
        <draw:custom-shape draw:style-name="gr14" draw:text-style-name="P6" draw:layer="layout" svg:width="0.8cm" svg:height="0.5cm" svg:x="4.2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9" draw:text-style-name="P9" draw:layer="layout" svg:width="1.1cm" svg:height="1.499cm" svg:x="22.6cm" svg:y="9cm" svg:viewBox="0 0 1101 1500" svg:d="M55 501c-22 86-147 163 73 260 134 58-164 179-58 267 108 90 136 151 132 268-6 184 170 70 279 155 193 152 362-92 323-173-85-174 163-77 44-267-71-114 96-193 220-285 119-88-128-184-118-277 17-150-180-169-279-259-77-70 64-259-220-164l-29-26z">
          <text:p/>
        </draw:path>
        <draw:custom-shape draw:style-name="gr21" draw:text-style-name="P6" draw:layer="layout" svg:width="0.802cm" svg:height="0.5cm" svg:x="22.703cm" svg:y="11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draw:layer="layout" svg:width="0.802cm" svg:height="0.5cm" svg:x="25.703cm" svg:y="11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9" draw:text-style-name="P9" draw:layer="layout" svg:width="0.199cm" svg:height="0.099cm" svg:x="26cm" svg:y="9.6cm" svg:viewBox="0 0 200 100" svg:d="M10 33c-4 6-27 11 13 18 25 4-29 12-10 18s24 10 24 17c-1 13 31 5 50 11 36 10 66-6 59-12-15-11 30-5 8-18-13-7 18-12 40-19 22-5-23-12-21-18 3-10-33-11-51-17-14-5 12-18-40-11l-5-2z">
          <text:p/>
        </draw:path>
        <draw:path draw:style-name="gr19" draw:text-style-name="P9" draw:layer="layout" svg:width="0.199cm" svg:height="0.099cm" svg:x="9.1cm" svg:y="7.4cm" svg:viewBox="0 0 200 100" svg:d="M10 33c-4 6-27 11 13 18 25 4-29 12-10 18s24 10 24 17c-1 13 31 5 50 11 36 10 66-6 59-12-15-11 30-5 8-18-13-7 18-12 40-19 22-5-23-12-21-18 3-10-33-11-51-17-14-5 12-18-40-11l-5-2z">
          <text:p/>
        </draw:path>
        <draw:line draw:style-name="gr13" draw:text-style-name="P1" draw:layer="layout" svg:x1="26.1cm" svg:y1="11.5cm" svg:x2="26.1cm" svg:y2="7.9cm">
          <text:p/>
        </draw:line>
        <draw:frame draw:style-name="gr18" draw:text-style-name="P4" draw:layer="layout" svg:width="7.5cm" svg:height="1cm" svg:x="8.5cm" svg:y="12cm">
          <draw:text-box>
            <text:p>PoolAndStone.txt</text:p>
          </draw:text-box>
        </draw:frame>
        <presentation:notes draw:style-name="dp2">
          <draw:page-thumbnail draw:style-name="gr7" draw:layer="layout" svg:width="19.798cm" svg:height="11.136cm" svg:x="0.6cm" svg:y="2.257cm" draw:page-number="4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nl" fo:country="N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6-02-19T16:37:58.672000000</meta:creation-date>
    <dc:date>2026-06-22T14:18:04.028000000</dc:date>
    <meta:editing-duration>P5DT8H39M34S</meta:editing-duration>
    <meta:editing-cycles>19</meta:editing-cycles>
    <meta:generator>LibreOffice/24.2.4.2$Windows_X86_64 LibreOffice_project/51a6219feb6075d9a4c46691dcfe0cd9c4fff3c2</meta:generator>
    <meta:document-statistic meta:object-count="112"/>
  </office:meta>
</office:document-meta>
</file>
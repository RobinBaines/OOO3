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E000003A258A0617D.png" manifest:media-type="image/png"/>
  <manifest:file-entry manifest:full-path="Pictures/100000000000058A000001177ABA9E3A.png" manifest:media-type="image/png"/>
  <manifest:file-entry manifest:full-path="Pictures/10000000000000FA0000025D2C6CB647.png" manifest:media-type="image/png"/>
  <manifest:file-entry manifest:full-path="Pictures/10000000000005890000010FCC1C9F2C.png" manifest:media-type="image/png"/>
  <manifest:file-entry manifest:full-path="Pictures/1000000000000407000003F64FEE16B2.png" manifest:media-type="image/png"/>
  <manifest:file-entry manifest:full-path="Pictures/10000000000005CC0000023FA8FEE18A.png" manifest:media-type="image/png"/>
  <manifest:file-entry manifest:full-path="Pictures/100000000000010C000001D73B38C0C7.png" manifest:media-type="image/png"/>
  <manifest:file-entry manifest:full-path="Pictures/100000000000012B00000097DE726F15.png" manifest:media-type="image/png"/>
  <manifest:file-entry manifest:full-path="Pictures/1000000000000142000000383404E833.png" manifest:media-type="image/png"/>
  <manifest:file-entry manifest:full-path="Pictures/10000000000001E100000367A6C244BB.png" manifest:media-type="image/png"/>
  <manifest:file-entry manifest:full-path="Pictures/100000000000051E000004907C2EAE05.png" manifest:media-type="image/png"/>
  <manifest:file-entry manifest:full-path="Pictures/100000000000032D00000553B4F780E4.png" manifest:media-type="image/png"/>
  <manifest:file-entry manifest:full-path="Pictures/10000000000006460000028F1FACF310.png" manifest:media-type="image/png"/>
  <manifest:file-entry manifest:full-path="Pictures/10000000000003640000027593AE98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Vet" style:font-family-generic="swiss"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Figure_20_Index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Figure">
      <style:text-properties fo:font-size="10pt" fo:language="en" fo:country="GB" style:font-size-asian="10pt" style:font-size-complex="10pt"/>
    </style:style>
    <style:style style:name="P5" style:family="paragraph" style:parent-style-name="Figure">
      <style:text-properties fo:language="en" fo:country="GB"/>
    </style:style>
    <style:style style:name="P6" style:family="paragraph" style:parent-style-name="Standard">
      <style:text-properties fo:language="en" fo:country="GB"/>
    </style:style>
    <style:style style:name="P7" style:family="paragraph" style:parent-style-name="Standard">
      <style:text-properties fo:language="en" fo:country="GB" officeooo:paragraph-rsid="0029fe44"/>
    </style:style>
    <style:style style:name="P8" style:family="paragraph" style:parent-style-name="Standard">
      <style:text-properties fo:language="en" fo:country="GB" officeooo:paragraph-rsid="00071fec"/>
    </style:style>
    <style:style style:name="P9" style:family="paragraph" style:parent-style-name="Standard">
      <style:text-properties fo:language="en" fo:country="GB" officeooo:paragraph-rsid="0036ef38"/>
    </style:style>
    <style:style style:name="P10" style:family="paragraph" style:parent-style-name="Text_20_body">
      <style:text-properties fo:language="en" fo:country="GB" officeooo:paragraph-rsid="0036ef38"/>
    </style:style>
    <style:style style:name="P11" style:family="paragraph" style:parent-style-name="Standard">
      <style:text-properties fo:language="en" fo:country="GB" officeooo:paragraph-rsid="001b6cda"/>
    </style:style>
    <style:style style:name="P12" style:family="paragraph" style:parent-style-name="Standard">
      <style:text-properties fo:language="en" fo:country="GB" officeooo:paragraph-rsid="0035d4f4"/>
    </style:style>
    <style:style style:name="P13" style:family="paragraph" style:parent-style-name="Text_20_body">
      <style:text-properties fo:language="en" fo:country="GB" officeooo:paragraph-rsid="0035d4f4"/>
    </style:style>
    <style:style style:name="P14" style:family="paragraph" style:parent-style-name="Standard">
      <style:text-properties fo:language="en" fo:country="GB" officeooo:paragraph-rsid="00371910"/>
    </style:style>
    <style:style style:name="P15" style:family="paragraph" style:parent-style-name="Standard">
      <style:text-properties fo:language="en" fo:country="GB" officeooo:paragraph-rsid="005466a7"/>
    </style:style>
    <style:style style:name="P16" style:family="paragraph" style:parent-style-name="Text_20_body">
      <style:text-properties fo:language="en" fo:country="GB" officeooo:paragraph-rsid="005466a7"/>
    </style:style>
    <style:style style:name="P17" style:family="paragraph" style:parent-style-name="Standard">
      <style:text-properties fo:language="en" fo:country="GB" officeooo:paragraph-rsid="0059b6d8"/>
    </style:style>
    <style:style style:name="P18" style:family="paragraph" style:parent-style-name="Text_20_body">
      <style:text-properties fo:language="en" fo:country="GB"/>
    </style:style>
    <style:style style:name="P19" style:family="paragraph" style:parent-style-name="Text_20_body">
      <style:text-properties fo:language="en" fo:country="GB" officeooo:paragraph-rsid="0053edff"/>
    </style:style>
    <style:style style:name="P20" style:family="paragraph" style:parent-style-name="Text_20_body">
      <style:text-properties fo:language="en" fo:country="GB" officeooo:paragraph-rsid="003a2df0"/>
    </style:style>
    <style:style style:name="P21" style:family="paragraph" style:parent-style-name="Text_20_body">
      <style:text-properties fo:language="en" fo:country="GB" officeooo:paragraph-rsid="002ec6f8"/>
    </style:style>
    <style:style style:name="P22" style:family="paragraph" style:parent-style-name="Text_20_body">
      <style:text-properties fo:language="en" fo:country="GB" officeooo:paragraph-rsid="003b970e"/>
    </style:style>
    <style:style style:name="P23" style:family="paragraph" style:parent-style-name="Text_20_body">
      <style:paragraph-properties fo:margin-top="0cm" fo:margin-bottom="0cm" style:contextual-spacing="false"/>
      <style:text-properties fo:language="en" fo:country="GB"/>
    </style:style>
    <style:style style:name="P24" style:family="paragraph" style:parent-style-name="Text_20_body">
      <style:text-properties fo:language="en" fo:country="GB" officeooo:paragraph-rsid="0032f3b7"/>
    </style:style>
    <style:style style:name="P25" style:family="paragraph" style:parent-style-name="Text_20_body">
      <style:text-properties fo:language="en" fo:country="GB" officeooo:rsid="00318114" officeooo:paragraph-rsid="003c2983"/>
    </style:style>
    <style:style style:name="P26" style:family="paragraph" style:parent-style-name="Text_20_body">
      <style:text-properties fo:language="en" fo:country="GB" officeooo:paragraph-rsid="002e4984"/>
    </style:style>
    <style:style style:name="P27" style:family="paragraph" style:parent-style-name="Text_20_body">
      <style:text-properties fo:language="en" fo:country="GB" officeooo:rsid="00385063" officeooo:paragraph-rsid="00385063"/>
    </style:style>
    <style:style style:name="P28" style:family="paragraph" style:parent-style-name="Text_20_body">
      <style:text-properties fo:language="en" fo:country="GB" officeooo:rsid="00385063" officeooo:paragraph-rsid="00417c74"/>
    </style:style>
    <style:style style:name="P29" style:family="paragraph" style:parent-style-name="Text_20_body">
      <style:text-properties fo:language="en" fo:country="GB" officeooo:rsid="00385063" officeooo:paragraph-rsid="006e7daa"/>
    </style:style>
    <style:style style:name="P30" style:family="paragraph" style:parent-style-name="Text_20_body">
      <style:text-properties fo:language="en" fo:country="GB" officeooo:rsid="00417c74" officeooo:paragraph-rsid="00417c74"/>
    </style:style>
    <style:style style:name="P31" style:family="paragraph" style:parent-style-name="Text_20_body">
      <style:text-properties fo:language="en" fo:country="GB" officeooo:rsid="00417c74" officeooo:paragraph-rsid="006e7daa"/>
    </style:style>
    <style:style style:name="P32" style:family="paragraph" style:parent-style-name="Text_20_body">
      <style:text-properties fo:language="en" fo:country="GB" officeooo:rsid="004316d4" officeooo:paragraph-rsid="004316d4"/>
    </style:style>
    <style:style style:name="P33" style:family="paragraph" style:parent-style-name="Text_20_body">
      <style:text-properties fo:language="en" fo:country="GB" officeooo:paragraph-rsid="00385063"/>
    </style:style>
    <style:style style:name="P34" style:family="paragraph" style:parent-style-name="Text_20_body">
      <style:text-properties fo:language="en" fo:country="GB" officeooo:paragraph-rsid="0050ef8e"/>
    </style:style>
    <style:style style:name="P35" style:family="paragraph" style:parent-style-name="Text_20_body">
      <style:text-properties fo:language="en" fo:country="GB" officeooo:rsid="0050ef8e" officeooo:paragraph-rsid="0050ef8e"/>
    </style:style>
    <style:style style:name="P36" style:family="paragraph" style:parent-style-name="Text_20_body">
      <style:text-properties fo:language="en" fo:country="GB" officeooo:paragraph-rsid="0068d286"/>
    </style:style>
    <style:style style:name="P37" style:family="paragraph" style:parent-style-name="Text_20_body">
      <style:text-properties fo:language="en" fo:country="GB" officeooo:paragraph-rsid="006795f9"/>
    </style:style>
    <style:style style:name="P38" style:family="paragraph" style:parent-style-name="Text_20_body">
      <style:paragraph-properties fo:margin-top="0cm" fo:margin-bottom="0cm" style:contextual-spacing="false"/>
      <style:text-properties fo:language="en" fo:country="GB" officeooo:paragraph-rsid="006c870a"/>
    </style:style>
    <style:style style:name="P39" style:family="paragraph" style:parent-style-name="Standard">
      <style:text-properties style:font-name="Arial" fo:font-size="10pt" fo:language="en" fo:country="GB" style:font-size-asian="10pt" style:font-size-complex="10pt"/>
    </style:style>
    <style:style style:name="P40" style:family="paragraph" style:parent-style-name="Standard">
      <style:text-properties style:font-name="Arial" fo:font-size="10pt" fo:language="en" fo:country="GB" officeooo:paragraph-rsid="00071fec" style:font-size-asian="10pt" style:font-size-complex="10pt"/>
    </style:style>
    <style:style style:name="P41" style:family="paragraph" style:parent-style-name="Standard">
      <style:text-properties style:font-name="Arial" fo:font-size="10pt" fo:language="en" fo:country="GB" officeooo:paragraph-rsid="005ebdf6" style:font-size-asian="10pt" style:font-size-complex="10pt"/>
    </style:style>
    <style:style style:name="P42" style:family="paragraph" style:parent-style-name="Standard">
      <style:text-properties style:font-name="Arial" fo:font-size="10pt" fo:language="en" fo:country="GB" officeooo:paragraph-rsid="00371910" style:font-size-asian="10pt" style:font-size-complex="10pt"/>
    </style:style>
    <style:style style:name="P43" style:family="paragraph" style:parent-style-name="Standard">
      <style:text-properties style:font-name="Arial" fo:font-size="10pt" fo:language="en" fo:country="GB" officeooo:rsid="00371910" officeooo:paragraph-rsid="00371910" style:font-size-asian="10pt" style:font-size-complex="10pt"/>
    </style:style>
    <style:style style:name="P44" style:family="paragraph" style:parent-style-name="Text_20_body">
      <style:text-properties style:font-name="Arial" fo:font-size="10pt" fo:language="en" fo:country="GB" officeooo:rsid="002c7998" officeooo:paragraph-rsid="0053edff" style:font-size-asian="10pt" style:font-size-complex="10pt"/>
    </style:style>
    <style:style style:name="P45" style:family="paragraph" style:parent-style-name="Standard">
      <style:text-properties style:font-name="Arial" fo:language="en" fo:country="GB"/>
    </style:style>
    <style:style style:name="P46" style:family="paragraph" style:parent-style-name="Standard">
      <style:paragraph-properties fo:break-before="page"/>
      <style:text-properties style:font-name="Arial" fo:language="en" fo:country="GB"/>
    </style:style>
    <style:style style:name="P47" style:family="paragraph" style:parent-style-name="Heading_20_1">
      <style:text-properties fo:font-size="12pt" fo:language="en" fo:country="GB" style:font-size-asian="12pt" style:font-size-complex="12pt"/>
    </style:style>
    <style:style style:name="P48" style:family="paragraph" style:parent-style-name="Heading_20_1">
      <style:text-properties fo:font-size="12pt" fo:language="en" fo:country="GB" officeooo:paragraph-rsid="00662b43" style:font-size-asian="12pt" style:font-size-complex="12pt"/>
    </style:style>
    <style:style style:name="P49" style:family="paragraph" style:parent-style-name="Heading_20_1">
      <style:text-properties fo:language="en" fo:country="GB"/>
    </style:style>
    <style:style style:name="P50" style:family="paragraph" style:parent-style-name="Heading_20_2">
      <style:text-properties fo:language="en" fo:country="GB"/>
    </style:style>
    <style:style style:name="P51" style:family="paragraph" style:parent-style-name="Heading_20_2">
      <style:text-properties fo:language="en" fo:country="GB" officeooo:paragraph-rsid="00180f3e"/>
    </style:style>
    <style:style style:name="P52" style:family="paragraph" style:parent-style-name="Heading_20_2">
      <style:text-properties fo:language="en" fo:country="GB" officeooo:paragraph-rsid="0068d286"/>
    </style:style>
    <style:style style:name="P53" style:family="paragraph" style:parent-style-name="Heading_20_2">
      <style:text-properties fo:language="en" fo:country="GB" officeooo:rsid="002e4984" officeooo:paragraph-rsid="002e4984"/>
    </style:style>
    <style:style style:name="P54" style:family="paragraph" style:parent-style-name="Heading_20_2">
      <style:text-properties officeooo:paragraph-rsid="006795f9"/>
    </style:style>
    <style:style style:name="P55" style:family="paragraph" style:parent-style-name="Standard" style:list-style-name="L1">
      <style:text-properties fo:language="en" fo:country="GB"/>
    </style:style>
    <style:style style:name="P56" style:family="paragraph" style:parent-style-name="Standard">
      <style:text-properties style:font-name="Arial" fo:font-size="10pt" fo:language="en" fo:country="GB" officeooo:paragraph-rsid="00071fec" style:font-size-asian="10pt" style:font-size-complex="10pt"/>
    </style:style>
    <style:style style:name="P57" style:family="paragraph" style:parent-style-name="Text_20_body" style:list-style-name="List_20_1">
      <style:text-properties fo:language="en" fo:country="GB"/>
    </style:style>
    <style:style style:name="P58" style:family="paragraph" style:parent-style-name="Text_20_body" style:list-style-name="L1">
      <style:text-properties fo:language="en" fo:country="GB"/>
    </style:style>
    <style:style style:name="P59" style:family="paragraph" style:parent-style-name="Text_20_body" style:list-style-name="L2">
      <style:text-properties fo:language="en" fo:country="GB"/>
    </style:style>
    <style:style style:name="P60" style:family="paragraph" style:parent-style-name="Text_20_body" style:list-style-name="L3">
      <style:text-properties fo:language="en" fo:country="GB" officeooo:paragraph-rsid="0068d286"/>
    </style:style>
    <style:style style:name="P61" style:family="paragraph" style:parent-style-name="Text_20_body" style:list-style-name="L4">
      <style:text-properties fo:language="en" fo:country="GB"/>
    </style:style>
    <style:style style:name="P62" style:family="paragraph" style:parent-style-name="Text_20_body">
      <style:text-properties fo:language="en" fo:country="GB" officeooo:rsid="00385063" officeooo:paragraph-rsid="0071d1ef"/>
    </style:style>
    <style:style style:name="P63" style:family="paragraph" style:parent-style-name="Text_20_body">
      <style:text-properties fo:language="en" fo:country="GB" officeooo:paragraph-rsid="00729208"/>
    </style:style>
    <style:style style:name="P64" style:family="paragraph" style:parent-style-name="Text_20_body">
      <style:text-properties fo:language="en" fo:country="GB" officeooo:paragraph-rsid="007440ba"/>
    </style:style>
    <style:style style:name="P65" style:family="paragraph" style:parent-style-name="Text_20_body">
      <style:text-properties style:font-name="Arial" fo:font-size="10pt" fo:language="en" fo:country="GB" officeooo:rsid="002ec6f8" officeooo:paragraph-rsid="002ec6f8" style:font-size-asian="10pt" style:font-size-complex="10pt"/>
    </style:style>
    <style:style style:name="P66" style:family="paragraph" style:parent-style-name="Text_20_body">
      <style:text-properties officeooo:paragraph-rsid="0068d286"/>
    </style:style>
    <style:style style:name="P67" style:family="paragraph" style:parent-style-name="Title">
      <style:text-properties fo:font-size="20pt" style:font-size-asian="20pt" style:font-size-complex="20pt"/>
    </style:style>
    <style:style style:name="T1" style:family="text">
      <style:text-properties officeooo:rsid="000474dc"/>
    </style:style>
    <style:style style:name="T2" style:family="text">
      <style:text-properties style:font-name="Arial" fo:font-size="10pt" style:font-size-asian="10pt" style:font-size-complex="10pt"/>
    </style:style>
    <style:style style:name="T3" style:family="text">
      <style:text-properties style:font-name="Arial" fo:font-size="10pt" officeooo:rsid="00071fec" style:font-size-asian="10pt" style:font-size-complex="10pt"/>
    </style:style>
    <style:style style:name="T4" style:family="text">
      <style:text-properties style:font-name="Arial" fo:font-size="10pt" officeooo:rsid="0008db70" style:font-size-asian="10pt" style:font-size-complex="10pt"/>
    </style:style>
    <style:style style:name="T5" style:family="text">
      <style:text-properties style:font-name="Arial" fo:font-size="10pt" officeooo:rsid="000aed3f" style:font-size-asian="10pt" style:font-size-complex="10pt"/>
    </style:style>
    <style:style style:name="T6" style:family="text">
      <style:text-properties style:font-name="Arial" fo:font-size="10pt" officeooo:rsid="000c310f" style:font-size-asian="10pt" style:font-size-complex="10pt"/>
    </style:style>
    <style:style style:name="T7" style:family="text">
      <style:text-properties style:font-name="Arial" fo:font-size="10pt" officeooo:rsid="000ece59" style:font-size-asian="10pt" style:font-size-complex="10pt"/>
    </style:style>
    <style:style style:name="T8" style:family="text">
      <style:text-properties style:font-name="Arial" fo:font-size="10pt" officeooo:rsid="000f9e6d" style:font-size-asian="10pt" style:font-size-complex="10pt"/>
    </style:style>
    <style:style style:name="T9" style:family="text">
      <style:text-properties style:font-name="Arial" fo:font-size="10pt" officeooo:rsid="000ff127" style:font-size-asian="10pt" style:font-size-complex="10pt"/>
    </style:style>
    <style:style style:name="T10" style:family="text">
      <style:text-properties style:font-name="Arial" fo:font-size="10pt" officeooo:rsid="001422a7" style:font-size-asian="10pt" style:font-size-complex="10pt"/>
    </style:style>
    <style:style style:name="T11" style:family="text">
      <style:text-properties style:font-name="Arial" fo:font-size="10pt" officeooo:rsid="0014cb4b" style:font-size-asian="10pt" style:font-size-complex="10pt"/>
    </style:style>
    <style:style style:name="T12" style:family="text">
      <style:text-properties style:font-name="Arial" fo:font-size="10pt" officeooo:rsid="00162691" style:font-size-asian="10pt" style:font-size-complex="10pt"/>
    </style:style>
    <style:style style:name="T13" style:family="text">
      <style:text-properties style:font-name="Arial" fo:font-size="10pt" officeooo:rsid="0016c861" style:font-size-asian="10pt" style:font-size-complex="10pt"/>
    </style:style>
    <style:style style:name="T14" style:family="text">
      <style:text-properties style:font-name="Arial" fo:font-size="10pt" officeooo:rsid="00170746" style:font-size-asian="10pt" style:font-size-complex="10pt"/>
    </style:style>
    <style:style style:name="T15" style:family="text">
      <style:text-properties style:font-name="Arial" fo:font-size="10pt" officeooo:rsid="00177fe9" style:font-size-asian="10pt" style:font-size-complex="10pt"/>
    </style:style>
    <style:style style:name="T16" style:family="text">
      <style:text-properties style:font-name="Arial" fo:font-size="10pt" officeooo:rsid="00180f3e" style:font-size-asian="10pt" style:font-size-complex="10pt"/>
    </style:style>
    <style:style style:name="T17" style:family="text">
      <style:text-properties style:font-name="Arial" fo:font-size="10pt" officeooo:rsid="001a0a7e" style:font-size-asian="10pt" style:font-size-complex="10pt"/>
    </style:style>
    <style:style style:name="T18" style:family="text">
      <style:text-properties style:font-name="Arial" fo:font-size="10pt" officeooo:rsid="001b6cda" style:font-size-asian="10pt" style:font-size-complex="10pt"/>
    </style:style>
    <style:style style:name="T19" style:family="text">
      <style:text-properties style:font-name="Arial" fo:font-size="10pt" officeooo:rsid="001c9398" style:font-size-asian="10pt" style:font-size-complex="10pt"/>
    </style:style>
    <style:style style:name="T20" style:family="text">
      <style:text-properties style:font-name="Arial" fo:font-size="10pt" officeooo:rsid="001e8f6c" style:font-size-asian="10pt" style:font-size-complex="10pt"/>
    </style:style>
    <style:style style:name="T21" style:family="text">
      <style:text-properties style:font-name="Arial" fo:font-size="10pt" officeooo:rsid="0020eda1" style:font-size-asian="10pt" style:font-size-complex="10pt"/>
    </style:style>
    <style:style style:name="T22" style:family="text">
      <style:text-properties style:font-name="Arial" fo:font-size="10pt" officeooo:rsid="0022a871" style:font-size-asian="10pt" style:font-size-complex="10pt"/>
    </style:style>
    <style:style style:name="T23" style:family="text">
      <style:text-properties style:font-name="Arial" fo:font-size="10pt" officeooo:rsid="002492d8" style:font-size-asian="10pt" style:font-size-complex="10pt"/>
    </style:style>
    <style:style style:name="T24" style:family="text">
      <style:text-properties style:font-name="Arial" fo:font-size="10pt" officeooo:rsid="002659f6" style:font-size-asian="10pt" style:font-size-complex="10pt"/>
    </style:style>
    <style:style style:name="T25" style:family="text">
      <style:text-properties style:font-name="Arial" fo:font-size="10pt" officeooo:rsid="0029407c" style:font-size-asian="10pt" style:font-size-complex="10pt"/>
    </style:style>
    <style:style style:name="T26" style:family="text">
      <style:text-properties style:font-name="Arial" fo:font-size="10pt" officeooo:rsid="0029fe44" style:font-size-asian="10pt" style:font-size-complex="10pt"/>
    </style:style>
    <style:style style:name="T27" style:family="text">
      <style:text-properties style:font-name="Arial" fo:font-size="10pt" officeooo:rsid="002a4c52" style:font-size-asian="10pt" style:font-size-complex="10pt"/>
    </style:style>
    <style:style style:name="T28" style:family="text">
      <style:text-properties style:font-name="Arial" fo:font-size="10pt" officeooo:rsid="002c04f1" style:font-size-asian="10pt" style:font-size-complex="10pt"/>
    </style:style>
    <style:style style:name="T29" style:family="text">
      <style:text-properties style:font-name="Arial" fo:font-size="10pt" officeooo:rsid="002c7998" style:font-size-asian="10pt" style:font-size-complex="10pt"/>
    </style:style>
    <style:style style:name="T30" style:family="text">
      <style:text-properties style:font-name="Arial" fo:font-size="10pt" officeooo:rsid="002ec6f8" style:font-size-asian="10pt" style:font-size-complex="10pt"/>
    </style:style>
    <style:style style:name="T31" style:family="text">
      <style:text-properties style:font-name="Arial" fo:font-size="10pt" officeooo:rsid="002fd012" style:font-size-asian="10pt" style:font-size-complex="10pt"/>
    </style:style>
    <style:style style:name="T32" style:family="text">
      <style:text-properties style:font-name="Arial" fo:font-size="10pt" officeooo:rsid="0035c3ad" style:font-size-asian="10pt" style:font-size-complex="10pt"/>
    </style:style>
    <style:style style:name="T33" style:family="text">
      <style:text-properties style:font-name="Arial" fo:font-size="10pt" officeooo:rsid="0035d4f4" style:font-size-asian="10pt" style:font-size-complex="10pt"/>
    </style:style>
    <style:style style:name="T34" style:family="text">
      <style:text-properties style:font-name="Arial" fo:font-size="10pt" officeooo:rsid="00371910" style:font-size-asian="10pt" style:font-size-complex="10pt"/>
    </style:style>
    <style:style style:name="T35" style:family="text">
      <style:text-properties style:font-name="Arial" fo:font-size="10pt" officeooo:rsid="00372940" style:font-size-asian="10pt" style:font-size-complex="10pt"/>
    </style:style>
    <style:style style:name="T36" style:family="text">
      <style:text-properties style:font-name="Arial" fo:font-size="10pt" officeooo:rsid="00385063" style:font-size-asian="10pt" style:font-size-complex="10pt"/>
    </style:style>
    <style:style style:name="T37" style:family="text">
      <style:text-properties style:font-name="Arial" fo:font-size="10pt" officeooo:rsid="003a2df0" style:font-size-asian="10pt" style:font-size-complex="10pt"/>
    </style:style>
    <style:style style:name="T38" style:family="text">
      <style:text-properties style:font-name="Arial" fo:font-size="10pt" officeooo:rsid="003b970e" style:font-size-asian="10pt" style:font-size-complex="10pt"/>
    </style:style>
    <style:style style:name="T39" style:family="text">
      <style:text-properties style:font-name="Arial" fo:font-size="10pt" officeooo:rsid="003de915" style:font-size-asian="10pt" style:font-size-complex="10pt"/>
    </style:style>
    <style:style style:name="T40" style:family="text">
      <style:text-properties style:font-name="Arial" fo:font-size="10pt" officeooo:rsid="003fd5a7" style:font-size-asian="10pt" style:font-size-complex="10pt"/>
    </style:style>
    <style:style style:name="T41" style:family="text">
      <style:text-properties style:font-name="Arial" fo:font-size="10pt" officeooo:rsid="004462fa" style:font-size-asian="10pt" style:font-size-complex="10pt"/>
    </style:style>
    <style:style style:name="T42" style:family="text">
      <style:text-properties style:font-name="Arial" fo:font-size="10pt" officeooo:rsid="0044fcbf" style:font-size-asian="10pt" style:font-size-complex="10pt"/>
    </style:style>
    <style:style style:name="T43" style:family="text">
      <style:text-properties style:font-name="Arial" fo:font-size="10pt" officeooo:rsid="00463665" style:font-size-asian="10pt" style:font-size-complex="10pt"/>
    </style:style>
    <style:style style:name="T44" style:family="text">
      <style:text-properties style:font-name="Arial" fo:font-size="10pt" officeooo:rsid="0047d157" style:font-size-asian="10pt" style:font-size-complex="10pt"/>
    </style:style>
    <style:style style:name="T45" style:family="text">
      <style:text-properties style:font-name="Arial" fo:font-size="10pt" officeooo:rsid="004f8198" style:font-size-asian="10pt" style:font-size-complex="10pt"/>
    </style:style>
    <style:style style:name="T46" style:family="text">
      <style:text-properties style:font-name="Arial" fo:font-size="10pt" officeooo:rsid="0050ef8e" style:font-size-asian="10pt" style:font-size-complex="10pt"/>
    </style:style>
    <style:style style:name="T47" style:family="text">
      <style:text-properties style:font-name="Arial" fo:font-size="10pt" officeooo:rsid="005206b3" style:font-size-asian="10pt" style:font-size-complex="10pt"/>
    </style:style>
    <style:style style:name="T48" style:family="text">
      <style:text-properties style:font-name="Arial" fo:font-size="10pt" officeooo:rsid="0053edff" style:font-size-asian="10pt" style:font-size-complex="10pt"/>
    </style:style>
    <style:style style:name="T49" style:family="text">
      <style:text-properties style:font-name="Arial" fo:font-size="10pt" officeooo:rsid="005466a7" style:font-size-asian="10pt" style:font-size-complex="10pt"/>
    </style:style>
    <style:style style:name="T50" style:family="text">
      <style:text-properties style:font-name="Arial" fo:font-size="10pt" officeooo:rsid="0054feb9" style:font-size-asian="10pt" style:font-size-complex="10pt"/>
    </style:style>
    <style:style style:name="T51" style:family="text">
      <style:text-properties style:font-name="Arial" fo:font-size="10pt" officeooo:rsid="005828da" style:font-size-asian="10pt" style:font-size-complex="10pt"/>
    </style:style>
    <style:style style:name="T52" style:family="text">
      <style:text-properties style:font-name="Arial" fo:font-size="10pt" officeooo:rsid="005b86f9" style:font-size-asian="10pt" style:font-size-complex="10pt"/>
    </style:style>
    <style:style style:name="T53" style:family="text">
      <style:text-properties style:font-name="Arial" fo:font-size="10pt" officeooo:rsid="00662b43" style:font-size-asian="10pt" style:font-size-complex="10pt"/>
    </style:style>
    <style:style style:name="T54" style:family="text">
      <style:text-properties style:font-name="Arial" fo:font-size="10pt" officeooo:rsid="006795f9" style:font-size-asian="10pt" style:font-size-complex="10pt"/>
    </style:style>
    <style:style style:name="T55" style:family="text">
      <style:text-properties style:font-name="Arial" fo:font-size="10pt" officeooo:rsid="0069ada7" style:font-size-asian="10pt" style:font-size-complex="10pt"/>
    </style:style>
    <style:style style:name="T56" style:family="text">
      <style:text-properties style:font-name="Arial" fo:font-size="10pt" officeooo:rsid="006c870a" style:font-size-asian="10pt" style:font-size-complex="10pt"/>
    </style:style>
    <style:style style:name="T57" style:family="text">
      <style:text-properties style:font-name="Arial" fo:font-size="10pt" officeooo:rsid="006fb5a1" style:font-size-asian="10pt" style:font-size-complex="10pt"/>
    </style:style>
    <style:style style:name="T58" style:family="text">
      <style:text-properties style:font-name="Arial" fo:font-size="10pt" officeooo:rsid="00729208" style:font-size-asian="10pt" style:font-size-complex="10pt"/>
    </style:style>
    <style:style style:name="T59" style:family="text">
      <style:text-properties style:font-name="Arial" fo:font-size="10pt" officeooo:rsid="007440ba" style:font-size-asian="10pt" style:font-size-complex="10pt"/>
    </style:style>
    <style:style style:name="T60" style:family="text">
      <style:text-properties style:font-name="Arial" fo:font-size="10pt" officeooo:rsid="00744eec" style:font-size-asian="10pt" style:font-size-complex="10pt"/>
    </style:style>
    <style:style style:name="T61" style:family="text">
      <style:text-properties style:font-name="Arial" fo:font-size="10pt" fo:language="en" fo:country="GB" style:font-size-asian="10pt" style:font-size-complex="10pt"/>
    </style:style>
    <style:style style:name="T62" style:family="text">
      <style:text-properties style:font-name="Arial" fo:font-size="10pt" fo:language="en" fo:country="GB" officeooo:rsid="00162691" style:font-size-asian="10pt" style:font-size-complex="10pt"/>
    </style:style>
    <style:style style:name="T63" style:family="text">
      <style:text-properties style:font-name="Arial" fo:font-size="10pt" fo:language="en" fo:country="GB" officeooo:rsid="00180f3e" style:font-size-asian="10pt" style:font-size-complex="10pt"/>
    </style:style>
    <style:style style:name="T64" style:family="text">
      <style:text-properties style:font-name="Arial" fo:font-size="10pt" fo:language="en" fo:country="GB" officeooo:rsid="000cc984" style:font-size-asian="10pt" style:font-size-complex="10pt"/>
    </style:style>
    <style:style style:name="T65" style:family="text">
      <style:text-properties style:font-name="Arial" fo:font-size="10pt" fo:language="en" fo:country="GB" officeooo:rsid="002659f6" style:font-size-asian="10pt" style:font-size-complex="10pt"/>
    </style:style>
    <style:style style:name="T66" style:family="text">
      <style:text-properties style:font-name="Arial" fo:font-size="10pt" fo:language="en" fo:country="GB" officeooo:rsid="004f8198" style:font-size-asian="10pt" style:font-size-complex="10pt"/>
    </style:style>
    <style:style style:name="T67" style:family="text">
      <style:text-properties style:font-name="Arial" fo:font-size="10pt" fo:language="en" fo:country="GB" officeooo:rsid="005206b3" style:font-size-asian="10pt" style:font-size-complex="10pt"/>
    </style:style>
    <style:style style:name="T68" style:family="text">
      <style:text-properties style:font-name="Arial" fo:font-size="10pt" fo:language="en" fo:country="GB" officeooo:rsid="0069ada7" style:font-size-asian="10pt" style:font-size-complex="10pt"/>
    </style:style>
    <style:style style:name="T69" style:family="text">
      <style:text-properties officeooo:rsid="0008db70"/>
    </style:style>
    <style:style style:name="T70" style:family="text">
      <style:text-properties style:text-line-through-style="none" style:text-line-through-type="none" style:font-name="Google Sans" fo:font-size="10pt" fo:language="en" fo:country="GB" style:text-underline-style="none" fo:font-weight="normal" style:text-blinking="false" style:font-size-asian="10pt" style:font-weight-asian="normal" style:font-size-complex="10pt" style:font-weight-complex="normal" loext:padding="0cm" loext:border="none"/>
    </style:style>
    <style:style style:name="T71" style:family="text">
      <style:text-properties officeooo:rsid="000ece59"/>
    </style:style>
    <style:style style:name="T72" style:family="text">
      <style:text-properties officeooo:rsid="0014cb4b"/>
    </style:style>
    <style:style style:name="T73" style:family="text">
      <style:text-properties officeooo:rsid="001b6cda"/>
    </style:style>
    <style:style style:name="T74" style:family="text">
      <style:text-properties officeooo:rsid="001c9398"/>
    </style:style>
    <style:style style:name="T75" style:family="text">
      <style:text-properties officeooo:rsid="001cbec6"/>
    </style:style>
    <style:style style:name="T76" style:family="text">
      <style:text-properties officeooo:rsid="002e4984"/>
    </style:style>
    <style:style style:name="T77" style:family="text">
      <style:text-properties officeooo:rsid="00318114"/>
    </style:style>
    <style:style style:name="T78" style:family="text">
      <style:text-properties officeooo:rsid="0032f3b7"/>
    </style:style>
    <style:style style:name="T79" style:family="text">
      <style:text-properties officeooo:rsid="0035d4f4"/>
    </style:style>
    <style:style style:name="T80" style:family="text">
      <style:text-properties officeooo:rsid="0036ef38"/>
    </style:style>
    <style:style style:name="T81" style:family="text">
      <style:text-properties officeooo:rsid="00385063"/>
    </style:style>
    <style:style style:name="T82" style:family="text">
      <style:text-properties officeooo:rsid="003a2df0"/>
    </style:style>
    <style:style style:name="T83" style:family="text">
      <style:text-properties officeooo:rsid="003c2983"/>
    </style:style>
    <style:style style:name="T84" style:family="text">
      <style:text-properties officeooo:rsid="00417c74"/>
    </style:style>
    <style:style style:name="T85" style:family="text">
      <style:text-properties officeooo:rsid="004276b6"/>
    </style:style>
    <style:style style:name="T86" style:family="text">
      <style:text-properties officeooo:rsid="00429912"/>
    </style:style>
    <style:style style:name="T87" style:family="text">
      <style:text-properties officeooo:rsid="004316d4"/>
    </style:style>
    <style:style style:name="T88" style:family="text">
      <style:text-properties officeooo:rsid="004462fa"/>
    </style:style>
    <style:style style:name="T89" style:family="text">
      <style:text-properties fo:language="en" fo:country="GB"/>
    </style:style>
    <style:style style:name="T90" style:family="text">
      <style:text-properties fo:language="en" fo:country="GB" officeooo:rsid="0014cb4b"/>
    </style:style>
    <style:style style:name="T91" style:family="text">
      <style:text-properties fo:language="en" fo:country="GB" officeooo:rsid="00058256"/>
    </style:style>
    <style:style style:name="T92" style:family="text">
      <style:text-properties officeooo:rsid="0044fcbf"/>
    </style:style>
    <style:style style:name="T93" style:family="text">
      <style:text-properties officeooo:rsid="00463665"/>
    </style:style>
    <style:style style:name="T94" style:family="text">
      <style:text-properties fo:font-variant="normal" fo:text-transform="none" fo:color="#1f1f1f" loext:opacity="100%" style:font-name="Arial" fo:font-size="10pt" fo:letter-spacing="normal" fo:language="en" fo:country="US" fo:font-style="normal" fo:font-weight="normal" officeooo:rsid="0047d157" style:font-size-asian="10pt" style:font-size-complex="10pt"/>
    </style:style>
    <style:style style:name="T95" style:family="text">
      <style:text-properties officeooo:rsid="0048b57c"/>
    </style:style>
    <style:style style:name="T96" style:family="text">
      <style:text-properties officeooo:rsid="004f8198"/>
    </style:style>
    <style:style style:name="T97" style:family="text">
      <style:text-properties officeooo:rsid="0050ef8e"/>
    </style:style>
    <style:style style:name="T98" style:family="text">
      <style:text-properties officeooo:rsid="005206b3"/>
    </style:style>
    <style:style style:name="T99" style:family="text">
      <style:text-properties officeooo:rsid="0053edff"/>
    </style:style>
    <style:style style:name="T100" style:family="text">
      <style:text-properties officeooo:rsid="005466a7"/>
    </style:style>
    <style:style style:name="T101" style:family="text">
      <style:text-properties officeooo:rsid="0054feb9"/>
    </style:style>
    <style:style style:name="T102" style:family="text">
      <style:text-properties officeooo:rsid="0059b6d8"/>
    </style:style>
    <style:style style:name="T103" style:family="text">
      <style:text-properties officeooo:rsid="005ebdf6"/>
    </style:style>
    <style:style style:name="T104" style:family="text">
      <style:text-properties officeooo:rsid="00635721"/>
    </style:style>
    <style:style style:name="T105" style:family="text">
      <style:text-properties officeooo:rsid="0063c8c0"/>
    </style:style>
    <style:style style:name="T106" style:family="text">
      <style:text-properties officeooo:rsid="0064a34f"/>
    </style:style>
    <style:style style:name="T107" style:family="text">
      <style:text-properties officeooo:rsid="00662b43"/>
    </style:style>
    <style:style style:name="T108" style:family="text">
      <style:text-properties officeooo:rsid="0068d286"/>
    </style:style>
    <style:style style:name="T109" style:family="text">
      <style:text-properties officeooo:rsid="0069ada7"/>
    </style:style>
    <style:style style:name="T110" style:family="text">
      <style:text-properties officeooo:rsid="006c870a"/>
    </style:style>
    <style:style style:name="T111" style:family="text">
      <style:text-properties officeooo:rsid="006e7daa"/>
    </style:style>
    <style:style style:name="T112" style:family="text">
      <style:text-properties officeooo:rsid="006f0a9b"/>
    </style:style>
    <style:style style:name="T113" style:family="text">
      <style:text-properties officeooo:rsid="0071d1ef"/>
    </style:style>
    <style:style style:name="T114" style:family="text">
      <style:text-properties officeooo:rsid="0072920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T112">Testing some aspects of </text:span><text:span text:style-name="T89">Object-Oriented Ontology </text:span><text:span text:style-name="T112">using an Open Source Software Tool.</text:span></text:p>
      <text:h text:style-name="P47" text:outline-level="1"><text:bookmark-start text:name="__RefHeading___Toc532_1337968144"/>Abstract<text:bookmark-end text:name="__RefHeading___Toc532_1337968144"/></text:h>
      <text:p text:style-name="P6"/>
      <text:p text:style-name="P18">Object-Oriented Ontology (OOO) is a recent philosophical movement that rejects human-centric thinking. Developed by thinkers like Graham Harman, Ian Bogost, and Timothy Morton, OOO emerged as a branch of Speculative Realism. </text:p>
      <text:p text:style-name="P18">The WOOOF program is an open source program which converts a scenario into an object model.</text:p>
      <text:p text:style-name="P18">I have used the WOOOF program to test <text:span text:style-name="T97">a limited set of </text:span>OOO ideas on three scenarios which describe interactions between objects without an explicit observer. This has resulted in a uniform approach which confirms that OOO is useful <text:span text:style-name="T106">for </text:span>analysi<text:span text:style-name="T106">s</text:span>.</text:p>
      <text:p text:style-name="P34">Compound objects come into existence and dis<text:span text:style-name="T97">integrate</text:span> during interactions. Avoiding internal hierarchy in these objects avoids complications and supports the OOO idea of a flat ontology. <text:span text:style-name="T39">However </text:span><text:span text:style-name="T29">OOO seems to suggest that an object could include another object and retain its identity. </text:span><text:span text:style-name="T33">When considering, </text:span><text:span text:style-name="T46">for example,</text:span><text:span text:style-name="T33"> coalescence of water drops t</text:span><text:span text:style-name="T29">his </text:span><text:span text:style-name="T33">seems to </text:span><text:span text:style-name="T29">impl</text:span><text:span text:style-name="T33">y</text:span><text:span text:style-name="T29"> that there is, what looks like an arbitrary boundary, on the </text:span><text:span text:style-name="T33">relative size of </text:span><text:span text:style-name="T29">drops.</text:span></text:p>
      <text:p text:style-name="P18">Time is divid<text:span text:style-name="T112">ed</text:span> it into periods of gradual change punctuated by events when changes occur to objects instantaneously. Th<text:span text:style-name="T1">e events</text:span> <text:span text:style-name="T80">are used to </text:span>implement the OOO idea of vicarious causation. </text:p>
      <text:p text:style-name="P18">A second <text:span text:style-name="T1">type of </text:span><text:span text:style-name="T72">scenario </text:span>introduces two observers, a human and a dog both <text:span text:style-name="T106">of which </text:span>perceive and influence each other. Parallel sub-scenarios are used to represent a delayed response of the observer to an action taken by the dog and vice versa. <text:span text:style-name="T106">A</text:span><text:span text:style-name="T72"> </text:span><text:span text:style-name="T92">simple</text:span><text:span text:style-name="T72"> </text:span><text:span text:style-name="T106">object </text:span><text:span text:style-name="T72">model </text:span>i<text:span text:style-name="T106">s introduced to organise pre-existing knowledge i</text:span>n the observers. </text:p>
      <text:p text:style-name="P35">The four scenarios support aspects of OOO but also extend it by including instantaneous Events and by introducing several objects types in observers.</text:p>
      <text:p text:style-name="P45"/>
      <text:p text:style-name="P46"/>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532_1337968144" text:style-name="Index_20_Link" text:visited-style-name="Index_20_Link">1 Abstract<text:tab/>1</text:a></text:p>
          <text:p text:style-name="P1"><text:a xlink:type="simple" xlink:href="#__RefHeading___Toc534_1337968144" text:style-name="Index_20_Link" text:visited-style-name="Index_20_Link">2 Introduction.<text:tab/>3</text:a></text:p>
          <text:p text:style-name="P1"><text:a xlink:type="simple" xlink:href="#__RefHeading___Toc536_1337968144" text:style-name="Index_20_Link" text:visited-style-name="Index_20_Link">3 How the WOOOF language has been used to express OOO ideas.<text:tab/>4</text:a></text:p>
          <text:p text:style-name="P3"><text:a xlink:type="simple" xlink:href="#__RefHeading___Toc550_1337968144" text:style-name="Index_20_Link" text:visited-style-name="Index_20_Link">3.1 The INIT object.<text:tab/>4</text:a></text:p>
          <text:p text:style-name="P3"><text:a xlink:type="simple" xlink:href="#__RefHeading___Toc556_1337968144" text:style-name="Index_20_Link" text:visited-style-name="Index_20_Link">3.2 Composition<text:tab/>4</text:a></text:p>
          <text:p text:style-name="P3"><text:a xlink:type="simple" xlink:href="#__RefHeading___Toc558_1337968144" text:style-name="Index_20_Link" text:visited-style-name="Index_20_Link">3.3 Inheritance.<text:tab/>6</text:a></text:p>
          <text:p text:style-name="P3"><text:a xlink:type="simple" xlink:href="#__RefHeading___Toc560_1337968144" text:style-name="Index_20_Link" text:visited-style-name="Index_20_Link">3.4 Visibility of Properties.<text:tab/>7</text:a></text:p>
          <text:p text:style-name="P3"><text:a xlink:type="simple" xlink:href="#__RefHeading___Toc554_1337968144" text:style-name="Index_20_Link" text:visited-style-name="Index_20_Link">3.5 Time and Events.<text:tab/>7</text:a></text:p>
          <text:p text:style-name="P3"><text:a xlink:type="simple" xlink:href="#__RefHeading___Toc562_1337968144" text:style-name="Index_20_Link" text:visited-style-name="Index_20_Link">3.6 Object Lifecycle.<text:tab/>8</text:a></text:p>
          <text:p text:style-name="P3"><text:a xlink:type="simple" xlink:href="#__RefHeading___Toc552_1337968144" text:style-name="Index_20_Link" text:visited-style-name="Index_20_Link">3.7 Independent Scenarios.<text:tab/>9</text:a></text:p>
          <text:p text:style-name="P3"><text:a xlink:type="simple" xlink:href="#__RefHeading___Toc564_1337968144" text:style-name="Index_20_Link" text:visited-style-name="Index_20_Link">3.8 Level of Detail.<text:tab/>10</text:a></text:p>
          <text:p text:style-name="P3"><text:a xlink:type="simple" xlink:href="#__RefHeading___Toc566_1337968144" text:style-name="Index_20_Link" text:visited-style-name="Index_20_Link">3.9 Compound Objects<text:tab/>11</text:a></text:p>
          <text:p text:style-name="P3"><text:a xlink:type="simple" xlink:href="#__RefHeading___Toc1295_1337968144" text:style-name="Index_20_Link" text:visited-style-name="Index_20_Link">3.10 Bringing it together: drops scenario as an Example<text:tab/>13</text:a></text:p>
          <text:p text:style-name="P3"><text:a xlink:type="simple" xlink:href="#__RefHeading___Toc568_1337968144" text:style-name="Index_20_Link" text:visited-style-name="Index_20_Link">3.11 Instantiation<text:tab/>14</text:a></text:p>
          <text:p text:style-name="P1"><text:a xlink:type="simple" xlink:href="#__RefHeading___Toc538_1337968144" text:style-name="Index_20_Link" text:visited-style-name="Index_20_Link">4 Do the scenarios support OOO?<text:tab/>15</text:a></text:p>
          <text:p text:style-name="P3"><text:a xlink:type="simple" xlink:href="#__RefHeading___Toc570_1337968144" text:style-name="Index_20_Link" text:visited-style-name="Index_20_Link">4.1 Level of Detail and Withdrawal.<text:tab/>15</text:a></text:p>
          <text:p text:style-name="P3"><text:a xlink:type="simple" xlink:href="#__RefHeading___Toc572_1337968144" text:style-name="Index_20_Link" text:visited-style-name="Index_20_Link">4.2 Timelines and Events. Two types of object?<text:tab/>15</text:a></text:p>
          <text:p text:style-name="P3"><text:a xlink:type="simple" xlink:href="#__RefHeading___Toc1297_1337968144" text:style-name="Index_20_Link" text:visited-style-name="Index_20_Link">4.3 A Generic Approach to Inanimate Interactions.<text:tab/>15</text:a></text:p>
          <text:p text:style-name="P3"><text:a xlink:type="simple" xlink:href="#__RefHeading___Toc574_1337968144" text:style-name="Index_20_Link" text:visited-style-name="Index_20_Link">4.4 Compound Objects.<text:tab/>15</text:a></text:p>
          <text:p text:style-name="P3"><text:a xlink:type="simple" xlink:href="#__RefHeading___Toc576_1337968144" text:style-name="Index_20_Link" text:visited-style-name="Index_20_Link">4.5 Scripts with Observers.<text:tab/>15</text:a></text:p>
          <text:p text:style-name="P3"><text:a xlink:type="simple" xlink:href="#__RefHeading___Toc578_1337968144" text:style-name="Index_20_Link" text:visited-style-name="Index_20_Link">4.6 Object hierarchy inside an Observer.<text:tab/>17</text:a></text:p>
          <text:p text:style-name="P1"><text:a xlink:type="simple" xlink:href="#__RefHeading___Toc540_1337968144" text:style-name="Index_20_Link" text:visited-style-name="Index_20_Link">5 If OOO does describe reality or, at the very least, is a useful analysis tool; what questions arise from its success?<text:tab/>18</text:a></text:p>
          <text:p text:style-name="P3"><text:a xlink:type="simple" xlink:href="#__RefHeading___Toc580_1337968144" text:style-name="Index_20_Link" text:visited-style-name="Index_20_Link">5.1 Why do Objects seem to work outside and inside an observer?<text:tab/>18</text:a></text:p>
          <text:p text:style-name="P3"><text:a xlink:type="simple" xlink:href="#__RefHeading___Toc582_1337968144" text:style-name="Index_20_Link" text:visited-style-name="Index_20_Link">5.2 An 'interface' Object which Observers use when Interpreting Reality<text:tab/>18</text:a></text:p>
          <text:p text:style-name="P1"><text:a xlink:type="simple" xlink:href="#__RefHeading___Toc542_1337968144" text:style-name="Index_20_Link" text:visited-style-name="Index_20_Link">6 Conclusion<text:tab/>18</text:a></text:p>
        </text:index-body>
      </text:table-of-content>
      <text:p text:style-name="P45"/>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2"><text:a xlink:type="simple" xlink:href="#Figure!0%7Csequence" text:style-name="Index_20_Link" text:visited-style-name="Index_20_Link">Figure 1: drops.txt<text:tab/>3</text:a></text:p>
          <text:p text:style-name="P2"><text:a xlink:type="simple" xlink:href="#Figure!1%7Csequence" text:style-name="Index_20_Link" text:visited-style-name="Index_20_Link">Figure 2: golf.txt<text:tab/>3</text:a></text:p>
          <text:p text:style-name="P2"><text:a xlink:type="simple" xlink:href="#Figure!2%7Csequence" text:style-name="Index_20_Link" text:visited-style-name="Index_20_Link">Figure 3: PoolAndStone.txt<text:tab/>4</text:a></text:p>
          <text:p text:style-name="P2"><text:a xlink:type="simple" xlink:href="#Figure!3%7Csequence" text:style-name="Index_20_Link" text:visited-style-name="Index_20_Link">Figure 4: The Real Object called RO_bigdrop is included in the SO called bigdrop.<text:tab/>5</text:a></text:p>
          <text:p text:style-name="P2"><text:a xlink:type="simple" xlink:href="#Figure!10%7Csequence" text:style-name="Index_20_Link" text:visited-style-name="Index_20_Link">Figure 5: The club_ball compound object.<text:tab/>5</text:a></text:p>
          <text:p text:style-name="P2"><text:a xlink:type="simple" xlink:href="#Figure!4%7Csequence" text:style-name="Index_20_Link" text:visited-style-name="Index_20_Link">Figure 6: Presentation of Inheritance<text:tab/>6</text:a></text:p>
          <text:p text:style-name="P2"><text:a xlink:type="simple" xlink:href="#Figure!5%7Csequence" text:style-name="Index_20_Link" text:visited-style-name="Index_20_Link">Figure 7: My_Nida is a dog. dog is an animal.<text:tab/>6</text:a></text:p>
          <text:p text:style-name="P2"><text:a xlink:type="simple" xlink:href="#Figure!12%7Csequence" text:style-name="Index_20_Link" text:visited-style-name="Index_20_Link">Figure 8: The drops scenario showing the INIT object, the collision timeline and the COLLISION Event.<text:tab/>8</text:a></text:p>
          <text:p text:style-name="P2"><text:a xlink:type="simple" xlink:href="#Figure!11%7Csequence" text:style-name="Index_20_Link" text:visited-style-name="Index_20_Link">Figure 9: the club_ball object is Greyed out, the separate club and ball objects survived the scenario.<text:tab/>9</text:a></text:p>
          <text:p text:style-name="P2"><text:a xlink:type="simple" xlink:href="#Figure!13%7Csequence" text:style-name="Index_20_Link" text:visited-style-name="Index_20_Link">Figure 10: PoolAndStone scenario showing Independent sub-scenarios: Air stops moving in pl1 and Stone falling in water in pl2.<text:tab/>10</text:a></text:p>
          <text:p text:style-name="P2"><text:a xlink:type="simple" xlink:href="#Figure!9%7Csequence" text:style-name="Index_20_Link" text:visited-style-name="Index_20_Link">Figure 11: The Stone touches the Water and the stone_air_water Compound object is created.<text:tab/>12</text:a></text:p>
          <text:p text:style-name="P2"><text:a xlink:type="simple" xlink:href="#Figure!6%7Csequence" text:style-name="Index_20_Link" text:visited-style-name="Index_20_Link">Figure 12: WOOOF output of drops.txt<text:tab/>14</text:a></text:p>
          <text:p text:style-name="P2"><text:a xlink:type="simple" xlink:href="#Figure!7%7Csequence" text:style-name="Index_20_Link" text:visited-style-name="Index_20_Link">Figure 13: SEE_SOMETHING black moving.<text:tab/>16</text:a></text:p>
          <text:p text:style-name="P2"><text:a xlink:type="simple" xlink:href="#Figure!8%7Csequence" text:style-name="Index_20_Link" text:visited-style-name="Index_20_Link">Figure 14: My_Nida contains Today_Nida and Today_Nida is a type of My_Nida.<text:tab/>17</text:a></text:p>
        </text:index-body>
      </text:illustration-index>
      <text:p text:style-name="P45"/>
      <text:p text:style-name="P46"/>
      <text:h text:style-name="P47" text:outline-level="1"><text:bookmark-start text:name="__RefHeading___Toc534_1337968144"/>Introduction. <text:s/><text:bookmark-end text:name="__RefHeading___Toc534_1337968144"/></text:h>
      <text:p text:style-name="P18">Object-Oriented Ontology (OOO) is a recent philosophical movement that rejects human-centric thinking. OOO asserts that all objects exist independently of human perception and share an equal ontological status. An object is fundamentally "withdrawn" and never fully knowable or reducible. Developed by thinkers like Graham Harman, Ian Bogost, and Timothy Morton, OOO emerged as a branch of Speculative Realism. </text:p>
      <text:p text:style-name="P18">See [1] Object-oriented Ontology: A New Theory of Everything by Graham Harman.</text:p>
      <text:p text:style-name="P18">And [2] Waves and Stones: On the Ultimate Nature of Reality by Graham Harman. </text:p>
      <text:p text:style-name="P39"><text:s/></text:p>
      <text:p text:style-name="P18">Several Object Oriented Ontology (OOO) ideas are:</text:p>
      <text:list text:style-name="List_20_1">
        <text:list-item>
          <text:list>
            <text:list-item>
              <text:p text:style-name="P57">Real Objects (ROs) with Real Qualities (RQs) and Sensual Objects (SOs) with Sensual Qualities (SQs) exist.</text:p>
            </text:list-item>
            <text:list-item>
              <text:p text:style-name="P57">Objects form a flat ontology implying, among other things, that interaction between inanimate objects without an observer is valid. </text:p>
            </text:list-item>
            <text:list-item>
              <text:p text:style-name="P57">Vicarious causation: <text:span text:style-name="T75">object</text:span> interaction <text:span text:style-name="T75">is facilitated by a third object</text:span>. </text:p>
            </text:list-item>
            <text:list-item>
              <text:p text:style-name="P57">Undermining; a real object cannot be reduced downward to only its parts. </text:p>
            </text:list-item>
            <text:list-item>
              <text:p text:style-name="P57">Overmining; a real object has a surplus beneath the sum total of effects. </text:p>
            </text:list-item>
            <text:list-item>
              <text:p text:style-name="P57">Under- and Over- mining require that an object is more than its pieces and less than its effects.</text:p>
            </text:list-item>
          </text:list>
        </text:list-item>
      </text:list>
      <text:p text:style-name="P18"/>
      <text:p text:style-name="Text_20_body"><text:span text:style-name="T89">The WOOOF program is an open source program</text:span><text:span text:style-name="T90"> which converts a scenario into an object model. It is </text:span><text:span text:style-name="T89">available from </text:span><text:a xlink:type="simple" xlink:href="https://github.com/RobinBaines/OOO3/releases/tag/v1.0.4" text:style-name="Internet_20_link" text:visited-style-name="Visited_20_Internet_20_Link"><text:span text:style-name="T89">https://github.com/RobinBaines/OOO3/releases/tag/v1.0.4</text:span></text:a><text:span text:style-name="T89">. The handbook is in the Readme.md file </text:span><text:span text:style-name="T91">on the site</text:span><text:span text:style-name="T89">.</text:span></text:p>
      <text:p text:style-name="P18">The WOOOF language uses some Object Oriented Programming (OOP) ideas; Inheritance, Properties and Co<text:span text:style-name="T72">mposition</text:span>. WOOOF allows experiments with different approaches to modelling objects and object interaction. I have used the WOOOF program to test <text:span text:style-name="T98">several </text:span>OOO ideas by modelling interactions between inanimate objects in three scenarios: <text:s/></text:p>
      <text:p text:style-name="P18"/>
      <text:list text:style-name="L1">
        <text:list-item>
          <text:p text:style-name="P55"><text:span text:style-name="T2">drops.txt <text:tab/><text:tab/></text:span><text:span text:style-name="T42">Two</text:span><text:span text:style-name="T2"> drops of water coalesce. The resulting drop splits in a gust of wind.</text:span></text:p>
        </text:list-item>
      </text:list>
      <text:p text:style-name="P6"><text:span text:style-name="T2"/></text:p>
      <text:p text:style-name="P39"><draw:frame draw:style-name="fr1" draw:name="Frame2" text:anchor-type="char" svg:width="15.46cm" draw:z-index="0"><draw:text-box fo:min-height="3.041cm"><text:p text:style-name="P5"><draw:frame draw:style-name="fr5" draw:name="Image2" text:anchor-type="paragraph" svg:width="15.46cm" style:rel-width="100%" svg:height="3.041cm" style:rel-height="scale" draw:z-index="1"><draw:image xlink:href="Pictures/100000000000058A000001177ABA9E3A.png" xlink:type="simple" xlink:show="embed" xlink:actuate="onLoad" draw:mime-type="image/png"/></draw:frame>Figure <text:sequence text:ref-name="refFigure0" text:name="Figure" text:formula="ooow:Figure+1" style:num-format="1">1</text:sequence>: drops.txt</text:p></draw:text-box></draw:frame></text:p>
      <text:list text:continue-numbering="true" text:style-name="L1">
        <text:list-item>
          <text:p text:style-name="P58">golf.txt<text:tab/><text:tab/><text:tab/>A golf club hits a golf ball and the club and ball form a new object. After a period of intense energy transfer the club and ball separate.</text:p>
        </text:list-item>
      </text:list>
      <text:p text:style-name="P18"/>
      <text:p text:style-name="P39"><draw:frame draw:style-name="fr1" draw:name="Frame3" text:anchor-type="char" svg:width="16.152cm" draw:z-index="2"><draw:text-box fo:min-height="3.089cm"><text:p text:style-name="P5"><draw:frame draw:style-name="fr5" draw:name="Image3" text:anchor-type="paragraph" svg:width="16.152cm" style:rel-width="100%" svg:height="3.089cm" style:rel-height="scale" draw:z-index="3"><draw:image xlink:href="Pictures/10000000000005890000010FCC1C9F2C.png" xlink:type="simple" xlink:show="embed" xlink:actuate="onLoad" draw:mime-type="image/png"/></draw:frame>Figure <text:sequence text:ref-name="refFigure1" text:name="Figure" text:formula="ooow:Figure+1" style:num-format="1">2</text:sequence>: golf.txt</text:p></draw:text-box></draw:frame></text:p>
      <text:p text:style-name="P39"/>
      <text:list text:continue-numbering="true" text:style-name="L1">
        <text:list-item>
          <text:p text:style-name="P58">PoolAndStone.txt<text:tab/><text:span text:style-name="T88">A</text:span> stone falls towards the surface of a pool of water. </text:p>
        </text:list-item>
      </text:list>
      <text:p text:style-name="P18"><text:tab/><text:tab/><text:tab/><text:tab/>The stone enters the water and comes to rest at the bottom of the pool. </text:p>
      <text:p text:style-name="P18"><text:tab/><text:tab/><text:tab/><text:tab/>The air which was disturbed by the passage of the stone comes to rest. </text:p>
      <text:p text:style-name="P18"><text:tab/><text:tab/><text:tab/><text:tab/>The water which was disturbed by the passage of the stone comes to rest.</text:p>
      <text:p text:style-name="P39"><draw:frame draw:style-name="fr1" draw:name="Frame4" text:anchor-type="char" svg:width="15.958cm" draw:z-index="4"><draw:text-box fo:min-height="6.182cm"><text:p text:style-name="P5"><draw:frame draw:style-name="fr5" draw:name="Image4" text:anchor-type="paragraph" svg:width="15.958cm" style:rel-width="100%" svg:height="6.182cm" style:rel-height="scale" draw:z-index="5"><draw:image xlink:href="Pictures/10000000000005CC0000023FA8FEE18A.png" xlink:type="simple" xlink:show="embed" xlink:actuate="onLoad" draw:mime-type="image/png"/></draw:frame>Figure <text:sequence text:ref-name="refFigure2" text:name="Figure" text:formula="ooow:Figure+1" style:num-format="1">3</text:sequence>: PoolAndStone.txt</text:p></draw:text-box></draw:frame><text:soft-page-break/></text:p>
      <text:p text:style-name="P39"/>
      <text:p text:style-name="P18">A forth scenario, dogs.txt, introduces two observers, a human called 'Me' and a dog called Nida.<text:tab/></text:p>
      <text:p text:style-name="P18"><text:tab/><text:tab/>A dog is sitting then running and then barking at an area where dogs can run freely. </text:p>
      <text:p text:style-name="P18"><text:tab/><text:tab/>The observer recognises the running dog and <text:span text:style-name="T98">later </text:span>hears it barking.</text:p>
      <text:p text:style-name="P18"><text:tab/><text:tab/>The observer commands the dog to sit.</text:p>
      <text:p text:style-name="P18"><text:tab/><text:tab/>The dog recognises the command, stops barking, stops running and sits.</text:p>
      <text:p text:style-name="P18"/>
      <text:p text:style-name="P18">The following scenarios are part of the WOOOF release on github.<text:tab/><text:tab/><text:tab/><text:tab/><text:tab/></text:p>
      <text:p text:style-name="P18"/>
      <text:list text:style-name="L2">
        <text:list-item>
          <text:p text:style-name="P59">ACW.txt <text:span text:style-name="T82">describes </text:span>the American Civil War and is an early script which was inspired by Graham Harman's analysis and ideas on object development using symbiosis. </text:p>
        </text:list-item>
        <text:list-item>
          <text:p text:style-name="P59">PoolAndStoneObject.txt<text:tab/> <text:span text:style-name="T107">is a version</text:span> the PoolAndStone.txt script using an alternative approach to compound objects.</text:p>
        </text:list-item>
      </text:list>
      <text:p text:style-name="P39"/>
      <text:p text:style-name="P18"><text:span text:style-name="T53">The </text:span><text:span text:style-name="T57">first</text:span><text:span text:style-name="T53"> chapter describes h</text:span><text:span text:style-name="T2">ow </text:span><text:span text:style-name="T3">the</text:span><text:span text:style-name="T2"> WOOOF language </text:span><text:span text:style-name="T53">has been</text:span><text:span text:style-name="T22"> used to </text:span><text:span text:style-name="T3">express </text:span><text:span text:style-name="T2">OOO ideas. </text:span><text:span text:style-name="T53">The following </text:span><text:span text:style-name="T57">chapter </text:span><text:span text:style-name="T53">addresses whether </text:span>the scenarios support OOO. <text:span text:style-name="T107">As this chapter is fairly positive about OOO it is followed by a discussion headed “</text:span><text:span text:style-name="T2">If OOO describe</text:span><text:span text:style-name="T3">s</text:span><text:span text:style-name="T2"> reality or, at the very least, is a useful analysis tool; what questions arise from its success?”</text:span></text:p>
      <text:h text:style-name="P48" text:outline-level="1"><text:bookmark-start text:name="__RefHeading___Toc536_1337968144"/><text:span text:style-name="T53">H</text:span><text:span text:style-name="T2">ow </text:span><text:span text:style-name="T3">the</text:span><text:span text:style-name="T2"> WOOOF language </text:span><text:span text:style-name="T53">has been</text:span><text:span text:style-name="T22"> used to </text:span><text:span text:style-name="T3">express </text:span><text:span text:style-name="T2">OOO ideas.</text:span><text:bookmark-end text:name="__RefHeading___Toc536_1337968144"/></text:h>
      <text:p text:style-name="P18"><text:span text:style-name="T2">The scenarios </text:span><text:span text:style-name="T21">can</text:span><text:span text:style-name="T2"> be </text:span><text:span text:style-name="T42">expressed</text:span><text:span text:style-name="T2"> using the WO</text:span><text:span text:style-name="T20">O</text:span><text:span text:style-name="T2">OF language in several ways </text:span><text:span text:style-name="T53">and</text:span><text:span text:style-name="T2"> </text:span><text:span text:style-name="T53">f</text:span><text:span text:style-name="T42">inding scenario</text:span><text:span text:style-name="T53">s</text:span><text:span text:style-name="T42"> </text:span><text:span text:style-name="T45">w</text:span><text:span text:style-name="T53">hich had a common approach and which </text:span><text:span text:style-name="T2">appl</text:span><text:span text:style-name="T20">y</text:span><text:span text:style-name="T2"> OOO ideas </text:span><text:span text:style-name="T53">consistently</text:span><text:span text:style-name="T2"> </text:span><text:span text:style-name="T42">involved several revisions</text:span><text:span text:style-name="T2">. </text:span></text:p>
      <text:p text:style-name="P18"><text:span text:style-name="T2">The WOOOF language is concerned with processing </text:span><text:span text:style-name="T23">the</text:span><text:span text:style-name="T2"> scenario and </text:span><text:span text:style-name="T53">then displaying it clearly</text:span><text:span text:style-name="T2">. One of the interesting aspects of using WOOOF has been to ask whether an object which, at first sight, looks like a means to structure the display, is not also a significant part of the scenario.</text:span></text:p>
      <text:p text:style-name="P18">The following summarises the findings.</text:p>
      <text:h text:style-name="Heading_20_2" text:outline-level="2"><text:bookmark-start text:name="__RefHeading___Toc550_1337968144"/>The INIT object.<text:bookmark-end text:name="__RefHeading___Toc550_1337968144"/></text:h>
      <text:p text:style-name="P18">The INIT object is the first object in a script and is used to introduce and initialise other objects. This convention avoids having to describe how each object has come into existence. For example it would be tedious to describe how the <text:span text:style-name="T98">two</text:span> drops in drops.txt came into existence via a series of events involving nucleation, condensation and collisions.</text:p>
      <text:p text:style-name="P18">The INIT object is not directly related to OOO but is useful for practical reasons related to scripting. </text:p>
      <text:p text:style-name="P18">It has similarities with the definition of initial conditions in engineering models.</text:p>
      <text:h text:style-name="P50" text:outline-level="2"><text:bookmark-start text:name="__RefHeading___Toc556_1337968144"/><text:span text:style-name="T71">Composition</text:span> <text:bookmark-end text:name="__RefHeading___Toc556_1337968144"/></text:h>
      <text:p text:style-name="P18"><text:span text:style-name="T2">In WOOOF </text:span><text:span text:style-name="T7">composition uses </text:span><text:span text:style-name="T2">the 'includes' and 'include_right' commands. </text:span><text:span text:style-name="T16">For example ‘</text:span><text:span text:style-name="T2">Me includes My_Nida’. </text:span><text:span text:style-name="T7">In OOP composition can also be expressed as </text:span><text:span text:style-name="T47">an </text:span><text:span text:style-name="T37">Object</text:span><text:span text:style-name="T7"> ‘has a</text:span><text:span text:style-name="T47">n</text:span><text:span text:style-name="T37">other’ object; </text:span><text:span text:style-name="T47">for example,</text:span><text:span text:style-name="T37"> a car has a steering wheel</text:span><text:span text:style-name="T7">. </text:span><text:span text:style-name="T2">The </text:span><text:span text:style-name="T7">include</text:span><text:span text:style-name="T2"> commands have been used to implement the OOO idea that an object can have parts which are also objects. </text:span></text:p>
      <text:p text:style-name="P20"><text:span text:style-name="T2">The scenarios use </text:span><text:span text:style-name="T7">Composition</text:span><text:span text:style-name="T2"> to express the relationship between a</text:span><text:span text:style-name="T7">n</text:span><text:span text:style-name="T2"> SO and a</text:span><text:span text:style-name="T7">n</text:span><text:span text:style-name="T2"> RO, </text:span><text:span text:style-name="T13">see figure 1</text:span><text:span text:style-name="T2">. </text:span></text:p>
      <text:p text:style-name="P7"><text:soft-page-break/><text:span text:style-name="T2"/></text:p>
      <text:p text:style-name="P7"><draw:frame draw:style-name="fr2" draw:name="Frame1" text:anchor-type="char" svg:width="7.911cm" draw:z-index="6"><draw:text-box fo:min-height="3.995cm"><text:p text:style-name="P4"><draw:frame draw:style-name="fr5" draw:name="Image1" text:anchor-type="paragraph" svg:width="7.911cm" style:rel-width="100%" svg:height="3.995cm" style:rel-height="scale" draw:z-index="7"><draw:image xlink:href="Pictures/100000000000012B00000097DE726F15.png" xlink:type="simple" xlink:show="embed" xlink:actuate="onLoad" draw:mime-type="image/png"/></draw:frame>Figure <text:sequence text:ref-name="refFigure3" text:name="Figure" text:formula="ooow:Figure+1" style:num-format="1">4</text:sequence>: The Real Object called RO_bigdrop is included in the SO called bigdrop.</text:p></draw:text-box></draw:frame><text:span text:style-name="T2"/></text:p>
      <text:p text:style-name="P18"><text:span text:style-name="T13">The display in WOOOF shows how </text:span><text:span text:style-name="T47">the SO </text:span><text:span text:style-name="T13">bigdrop can be thought of as a ‘wrapper’ object which </text:span><text:span text:style-name="T38">encapsulates and protects</text:span><text:span text:style-name="T13"> the RO </text:span><text:span text:style-name="T14">called RO_bigdrop </text:span><text:span text:style-name="T13">from </text:span><text:span text:style-name="T14">external </text:span><text:span text:style-name="T13">access. </text:span>This is a reasonable match with the OOO concept of the withdrawal of real objects.</text:p>
      <text:p text:style-name="P37"><text:span text:style-name="T2">An object which </text:span><text:span text:style-name="T7">is composed</text:span><text:span text:style-name="T2"> of two or more other objects is called a Compound object, </text:span><text:span text:style-name="T54">see the following figure of the club_ball Compound object which occurs in the golf.txt scenario.</text:span><text:span text:style-name="T2"> Encapsulation refers to the OOP idea that objects in a Compound object may be complet</text:span><text:span text:style-name="T26">e</text:span><text:span text:style-name="T37">l</text:span><text:span text:style-name="T2">y or partially invisible from outside the Compound object. This ‘information hiding’ serves to protect the internal data/objects.</text:span></text:p>
      <text:p text:style-name="P37"><text:span text:style-name="T2"/></text:p>
      <text:p text:style-name="P37"><draw:frame draw:style-name="fr2" draw:name="Frame11" text:anchor-type="char" svg:width="5.025cm" draw:z-index="20"><draw:text-box fo:min-height="12.16cm"><text:p text:style-name="Figure"><draw:frame draw:style-name="fr5" draw:name="Image11" text:anchor-type="paragraph" svg:width="5.025cm" style:rel-width="100%" svg:height="12.16cm" style:rel-height="scale" draw:z-index="21"><draw:image xlink:href="Pictures/10000000000000FA0000025D2C6CB647.png" xlink:type="simple" xlink:show="embed" xlink:actuate="onLoad" draw:mime-type="image/png"/></draw:frame>Figure <text:sequence text:ref-name="refFigure4" text:name="Figure" text:formula="ooow:Figure+1" style:num-format="1">5</text:sequence>: The club_ball compound object.</text:p></draw:text-box></draw:frame><text:span text:style-name="T2"/></text:p>
      <text:h text:style-name="P51" text:outline-level="2"><text:bookmark-start text:name="__RefHeading___Toc558_1337968144"/><text:soft-page-break/>Inheritance. <text:bookmark-end text:name="__RefHeading___Toc558_1337968144"/></text:h>
      <text:p text:style-name="P18"><text:span text:style-name="T2">Inheritance is an OOP term: Child classes may inherit (or be derived) from a parent class. The children are usually a type of the parent; </text:span><text:span text:style-name="T9">or the child ‘ís a’ parent</text:span><text:span text:style-name="T2">. WOOOF supports inheritance using the 'type' or 'type of' command. </text:span></text:p>
      <text:p text:style-name="P18"><draw:frame draw:style-name="fr2" draw:name="Frame6" text:anchor-type="char" svg:width="8.52cm" draw:z-index="10"><draw:text-box fo:min-height="1.482cm"><text:p text:style-name="P5"><draw:frame draw:style-name="fr5" draw:name="Image6" text:anchor-type="paragraph" svg:width="8.52cm" style:rel-width="100%" svg:height="1.482cm" style:rel-height="scale" draw:z-index="11"><draw:image xlink:href="Pictures/1000000000000142000000383404E833.png" xlink:type="simple" xlink:show="embed" xlink:actuate="onLoad" draw:mime-type="image/png"/></draw:frame>Figure <text:sequence text:ref-name="refFigure5" text:name="Figure" text:formula="ooow:Figure+1" style:num-format="1">6</text:sequence>: Presentation of Inheritance</text:p></draw:text-box></draw:frame><text:span text:style-name="T2"/></text:p>
      <text:p text:style-name="P65">The figure shows how COLLISION is a type of SO_EVENT.</text:p>
      <text:p text:style-name="P21"><text:span text:style-name="T30">The dogs scenario introduces observers, a human and a dog. Inheritance is used to structure knowledge, for example, the human has an object animal which is parent to the objects human and dog and dog is in turn parent to a dog called My_Nida. <text:s/>T</text:span><text:span text:style-name="T2">he object 'dog' has properties which apply to all dogs. </text:span><text:span text:style-name="T31">This is illustrated in the following figure which shows the object hierarchy as shown by WOOOF.</text:span></text:p>
      <text:p text:style-name="P21"><text:span text:style-name="T31"/></text:p>
      <text:p text:style-name="P22"><draw:frame draw:style-name="fr2" draw:name="Frame7" text:anchor-type="char" svg:width="7.091cm" draw:z-index="12"><draw:text-box fo:min-height="12.462cm"><text:p text:style-name="P5"><draw:frame draw:style-name="fr5" draw:name="Image7" text:anchor-type="paragraph" svg:width="7.091cm" style:rel-width="100%" svg:height="12.462cm" style:rel-height="scale" draw:z-index="13"><draw:image xlink:href="Pictures/100000000000010C000001D73B38C0C7.png" xlink:type="simple" xlink:show="embed" xlink:actuate="onLoad" draw:mime-type="image/png"/></draw:frame>Figure <text:sequence text:ref-name="refFigure6" text:name="Figure" text:formula="ooow:Figure+1" style:num-format="1">7</text:sequence>: My_Nida is a dog. dog is an animal. </text:p></draw:text-box></draw:frame><text:span text:style-name="T26"/></text:p>
      <text:p text:style-name="P18"><text:span text:style-name="T26">In OOP </text:span><text:span text:style-name="T38">a</text:span><text:span text:style-name="T2"> parent </text:span><text:span text:style-name="T38">object </text:span><text:span text:style-name="T2">may be </text:span><text:span text:style-name="T16">an </text:span><text:span text:style-name="T2">abstract object implying that it cannot be implemented. What this could mean in a scenario is illustrated by an example: If the parent is 'dog' then a child may be an actual dog called </text:span><text:span text:style-name="T31">My_</text:span><text:span text:style-name="T2">Nida. The 'dog' </text:span><text:span text:style-name="T12">would be</text:span><text:span text:style-name="T2"> abstract </text:span><text:span text:style-name="T12">if we accept that</text:span><text:span text:style-name="T2"> there can be no actual 'dog' walking around.</text:span></text:p>
      <text:p text:style-name="P18"><text:span text:style-name="T7">In general one object including another object using composition implies a loose coupling between the objects. Inheritance implies a tight coupling </text:span><text:span text:style-name="T15">and a tight coupling implies more changes to software </text:span><text:span text:style-name="T16">when compared with</text:span><text:span text:style-name="T15"> loose coupling, if changes in requirements occur.</text:span><text:span text:style-name="T2"> <text:s text:c="2"/></text:span></text:p>
      <text:p text:style-name="P18"><text:tab/></text:p>
      <text:p text:style-name="P18"><text:span text:style-name="T2">WOOOF is useful for testing alternative approaches. In some earlier versions of the dogs scenario, knowledge in an observer was represented using </text:span><text:span text:style-name="T8">composition</text:span><text:span text:style-name="T2"> instead of inheritance. Inheritance results in a more natural implementation and can also be used to show that the observer, called 'Me', realises he is a </text:span><text:soft-page-break/><text:span text:style-name="T2">type of 'human'. </text:span>Using inheritance to express the relationship between an SO as child of an RO as parent is less satisfactory than using composition; the SOs of an RO differ from each other and from the RO and there is no reason to suggest that one is a type of the other.</text:p>
      <text:h text:style-name="P50" text:outline-level="2"><text:bookmark-start text:name="__RefHeading___Toc560_1337968144"/>Visibility of Properties. <text:bookmark-end text:name="__RefHeading___Toc560_1337968144"/></text:h>
      <text:p text:style-name="P18">In OOP languages such as C#, properties of a parent class may be Private or Public. Private properties are not accessible from the child class. Public Properties in a parent class are accessible from the child class. </text:p>
      <text:p text:style-name="P18"><text:span text:style-name="T2">At this time there is no explicit Private/Public modifier in WOOOF but properties can be overridden. The parent 'classes' such as animal, dog and human have properties which apply to most of the derived objects, for example, a 'dog' represents </text:span><text:span text:style-name="T26">what I may know about </text:span><text:span text:style-name="T2">dogs and could have properties: </text:span></text:p>
      <text:p text:style-name="P18"><text:tab/>dog has the property <text:tab/>BackLeftLeg</text:p>
      <text:p text:style-name="P18"><text:tab/>dog has the property <text:tab/>FrontRightLeg</text:p>
      <text:p text:style-name="P18"><text:tab/>dog has the property <text:tab/>BackRightLeg</text:p>
      <text:p text:style-name="P18"><text:tab/>dog has the property <text:tab/>Barks [= true<text:tab/>//true is assumed if there is no true or false specified.]</text:p>
      <text:p text:style-name="P18"/>
      <text:p text:style-name="P18">If My_Nida does not bark the bark property of dog is overridden</text:p>
      <text:p text:style-name="P18"><text:tab/>My_Nida has property Bark = false</text:p>
      <text:p text:style-name="P18">If this override is not present then My_Nida inherits the Barks property from 'dog'; she barks!</text:p>
      <text:p text:style-name="P18"/>
      <text:p text:style-name="P18">The scripts are representations of how objects could relate to each other and to keep the scripts short, properties have been kept to a minimum. Scripts of inanimate interactions include coordinate and velocity properties. In retrospect this looks like an artifact of scripting and real interactions would not need this sort of decoration.</text:p>
      <text:h text:style-name="P52" text:outline-level="2"><text:bookmark-start text:name="__RefHeading___Toc554_1337968144"/>Time and Events.<text:bookmark-end text:name="__RefHeading___Toc554_1337968144"/></text:h>
      <text:p text:style-name="P36"><text:span text:style-name="T2">Time </text:span><text:span text:style-name="T24">increases</text:span><text:span text:style-name="T2"> from top to bottom </text:span><text:span text:style-name="T45">in the text file in which</text:span><text:span text:style-name="T2"> </text:span><text:span text:style-name="T45">a </text:span><text:span text:style-name="T37">scenario</text:span><text:span text:style-name="T2"> </text:span><text:span text:style-name="T45">is defined </text:span><text:span text:style-name="T2">and from left to right in the WOOOF </text:span><text:span text:style-name="T16">display</text:span><text:span text:style-name="T2">. </text:span></text:p>
      <text:p text:style-name="P36"><text:span text:style-name="T2">Time has </text:span><text:span text:style-name="T12">two</text:span><text:span text:style-name="T2"> implementations:</text:span></text:p>
      <text:list text:style-name="L3">
        <text:list-item>
          <text:p text:style-name="P60">A 'Timeline' is a Sensual Object with a finite duration. It is derived from <text:span text:style-name="T96">an object called </text:span>RO_timeline, which is a single RO representing the time continuum. </text:p>
        </text:list-item>
        <text:list-item>
          <text:p text:style-name="P60">A discrete Event is a Real Object with no duration and is unique. ("un momento dado"; Johan Cruyff). <text:span text:style-name="T99">An Event can</text:span><text:span text:style-name="T32"> involve no more than </text:span><text:span text:style-name="T48">two</text:span><text:span text:style-name="T2"> objects </text:span><text:span text:style-name="T48">because it is instantaneous. </text:span>Potentially there could be a none countable, infinite number of Events. In practice an Event is instantiated when an object ends or an object becomes part of a new object or if a property of an object changes. By convention Events names are in capital letters. </text:p>
        </text:list-item>
      </text:list>
      <text:p text:style-name="P36"/>
      <text:p text:style-name="P63"><text:span text:style-name="T98">To clarify the WOOOF display a</text:span>n Event may have an input and/or an output object. The scripts use objects which are called INPUTx and OUTPUTx, by convention; see <text:span text:style-name="T108">the drops scenario</text:span> for examples <text:span text:style-name="T109">and following figure</text:span>. </text:p>
      <text:p text:style-name="P63"/>
      <text:p text:style-name="P64"><text:span text:style-name="T58">The Real Object called RO_COLLISION is contained within the SO called COLLISION. </text:span><text:span text:style-name="T25">I</text:span><text:span text:style-name="T2">n </text:span><text:span text:style-name="T59">the</text:span><text:span text:style-name="T2"> interpretation of OOO </text:span><text:span text:style-name="T59">used in the scenarios</text:span><text:span text:style-name="T25">, </text:span><text:span text:style-name="T58">Real Object </text:span><text:span text:style-name="T2">Events are responsible for vicarious causation, </text:span><text:span text:style-name="T59">see </text:span><text:span text:style-name="T60">for more detail</text:span><text:span text:style-name="T59"> </text:span><text:span text:style-name="T59"><text:bookmark-ref text:reference-format="chapter" text:ref-name="__RefHeading___Toc564_1337968144">3.8</text:bookmark-ref></text:span><text:span text:style-name="T59"><text:s/></text:span><text:span text:style-name="T59"><text:bookmark-ref text:reference-format="text" text:ref-name="__RefHeading___Toc564_1337968144">Level of Detail.</text:bookmark-ref></text:span><text:span text:style-name="T59"><text:s/></text:span></text:p>
      <text:p text:style-name="P36"><draw:frame draw:style-name="fr1" draw:name="Frame13" text:anchor-type="char" svg:width="13.728cm" draw:z-index="24"><draw:text-box fo:min-height="17.78cm"><text:p text:style-name="Figure"><draw:frame draw:style-name="fr5" draw:name="Image13" text:anchor-type="paragraph" svg:width="13.728cm" style:rel-width="100%" svg:height="17.78cm" style:rel-height="scale" draw:z-index="25"><draw:image xlink:href="Pictures/10000000000002CE000003A258A0617D.png" xlink:type="simple" xlink:show="embed" xlink:actuate="onLoad" draw:mime-type="image/png"/></draw:frame>Figure <text:sequence text:ref-name="refFigure7" text:name="Figure" text:formula="ooow:Figure+1" style:num-format="1">8</text:sequence>: The drops scenario showing the INIT object, the collision timeline and the COLLISION Event.</text:p></draw:text-box></draw:frame><text:soft-page-break/></text:p>
      <text:p text:style-name="P36">Events occur at the beginning and end of a Timeline and it is the time stamps of these Events which mark the start and the end of the enclosed Timeline.</text:p>
      <text:p text:style-name="P66"><text:span text:style-name="T68">The word e</text:span><text:span text:style-name="T61">vent is </text:span><text:span text:style-name="T66">most often </text:span><text:span text:style-name="T61">used to describe a visit to the theatre or a football match. </text:span><text:span text:style-name="T63">In WOOOF the meaning </text:span><text:span text:style-name="T61">is closer to the idea of an event in a c# program: A mouse click, a file has </text:span><text:span text:style-name="T62">just </text:span><text:span text:style-name="T61">been read. </text:span><text:span text:style-name="T64">A</text:span><text:span text:style-name="T67">n</text:span><text:span text:style-name="T62"> </text:span><text:span text:style-name="T64">alternative </text:span><text:span text:style-name="T63">name </text:span><text:span text:style-name="T64">is O</text:span><text:span text:style-name="T65">perator</text:span><text:span text:style-name="T64">. </text:span><text:span text:style-name="T61">In quantum mechanics, </text:span><text:span text:style-name="Strong_20_Emphasis"><text:span text:style-name="T70">operators</text:span></text:span><text:span text:style-name="T61"> represent mathematical instructions like measuring position or momentum and act instantaneously. </text:span></text:p>
      <text:p text:style-name="P64"><text:span text:style-name="T58"/></text:p>
      <text:h text:style-name="P50" text:outline-level="2"><text:bookmark-start text:name="__RefHeading___Toc562_1337968144"/>Object <text:span text:style-name="T69">Lifecycle</text:span>.<text:bookmark-end text:name="__RefHeading___Toc562_1337968144"/></text:h>
      <text:p text:style-name="P18">If an Object, for example My_Nida in dogs.txt, has been included in a TimeLine and is then included in the next Event, the My_Nida SO is reproduced by the WOOOF program and the version in the Timeline SO is<text:span text:style-name="T99"> </text:span>greyed out. As the object proceeds through the Timelines and Events its properties change but the copies in preceding Timelines and Events do not. <text:s/>We can think of these objects as 'snapshots' made at the moment <text:soft-page-break/>the containing Timeline ends. If an object does not end within the scenario it will not be greyed out in the last TimeLine; it has survived the scenario!</text:p>
      <text:p text:style-name="P18"/>
      <text:p text:style-name="P18"><draw:frame draw:style-name="fr2" draw:name="Frame12" text:anchor-type="char" svg:width="3.833cm" draw:z-index="22"><draw:text-box fo:min-height="8.939cm"><text:p text:style-name="Figure"><draw:frame draw:style-name="fr5" draw:name="Image12" text:anchor-type="paragraph" svg:width="5.71cm" style:rel-width="149%" svg:height="10.338cm" style:rel-height="scale" draw:z-index="23"><draw:image xlink:href="Pictures/10000000000001E100000367A6C244BB.png" xlink:type="simple" xlink:show="embed" xlink:actuate="onLoad" draw:mime-type="image/png"/></draw:frame>Figure <text:sequence text:ref-name="refFigure8" text:name="Figure" text:formula="ooow:Figure+1" style:num-format="1">9</text:sequence>: the club_ball object is Greyed out, the separate club and ball objects survived the scenario.</text:p></draw:text-box></draw:frame></text:p>
      <text:p text:style-name="P36">This approach to object lifetime emphasises the lifecycle of objects: Objects come into existence, evolve as they interact and may end their existence within the scenario. <text:span text:style-name="T108">The following figure shows the Compound object club_ball greyed out in the SPLIT Event and that, after the split, the separated club and ball objects still exist; are not greyed out. <text:s/></text:span></text:p>
      <text:h text:style-name="P54" text:outline-level="2"><text:bookmark-start text:name="__RefHeading___Toc552_1337968144"/>Independent Scenarios.<text:bookmark-end text:name="__RefHeading___Toc552_1337968144"/></text:h>
      <text:p text:style-name="P37"><text:span text:style-name="T45">Several i</text:span><text:span text:style-name="T2">ndependent scenarios </text:span><text:span text:style-name="T41">can occur </text:span><text:span text:style-name="T2">within </text:span><text:span text:style-name="T12">the</text:span><text:span text:style-name="T2"> main scenario. This idea is </text:span><text:span text:style-name="T24">used</text:span><text:span text:style-name="T2"> in the PoolAndStone script: </text:span><text:span text:style-name="T47">A</text:span><text:span text:style-name="T2">t a certain moment the stone is fully submerged and it continues to fall through the water. Independently, the air, which was disturbed earlier by the passage of the stone above the water, slowly comes to rest. The stone sinking in water and the air coming to rest are </text:span><text:span text:style-name="T12">two</text:span><text:span text:style-name="T2"> independent </text:span><text:span text:style-name="T45">s</text:span><text:span text:style-name="T2">cenarios and are displayed in </text:span><text:span text:style-name="T12">two </text:span><text:span text:style-name="T2">independent ‘</text:span><text:span text:style-name="T45">placeholder’ objects. </text:span><text:span text:style-name="T55">See</text:span><text:span text:style-name="T45"> </text:span><text:span text:style-name="T55">pl2 and pl1 in the following figure.</text:span><text:span text:style-name="T2"> </text:span></text:p>
      <text:p text:style-name="P37"><draw:frame draw:style-name="fr3" draw:name="Frame14" text:anchor-type="char" svg:x="-0.333cm" svg:y="0cm" svg:width="17cm" draw:z-index="26"><draw:text-box fo:min-height="15.157cm"><text:p text:style-name="Figure"><draw:frame draw:style-name="fr5" draw:name="Image14" text:anchor-type="paragraph" svg:width="17cm" style:rel-width="100%" svg:height="15.157cm" style:rel-height="scale" draw:z-index="27"><draw:image xlink:href="Pictures/100000000000051E000004907C2EAE05.png" xlink:type="simple" xlink:show="embed" xlink:actuate="onLoad" draw:mime-type="image/png"/></draw:frame>Figure <text:sequence text:ref-name="refFigure9" text:name="Figure" text:formula="ooow:Figure+1" style:num-format="1">10</text:sequence>: PoolAndStone scenario sho<text:span text:style-name="T109">w</text:span>ing Independent sub-scenarios: Air stops moving <text:span text:style-name="T109">in pl1 </text:span>and S<text:span text:style-name="T109">t</text:span>one fall<text:span text:style-name="T109">ing</text:span> in water <text:span text:style-name="T109">in pl2</text:span>.</text:p></draw:text-box></draw:frame><text:soft-page-break/><text:span text:style-name="T2"/></text:p>
      <text:h text:style-name="P50" text:outline-level="2"><text:bookmark-start text:name="__RefHeading___Toc564_1337968144"/>Level of Detail.<text:bookmark-end text:name="__RefHeading___Toc564_1337968144"/></text:h>
      <text:p text:style-name="P18"><text:span text:style-name="T2">Timelines and Events are related to paradoxes discussed by Zeno of Elea;</text:span><text:span text:style-name="T38"> i</text:span><text:span text:style-name="T2">f we are tempted </text:span><text:span text:style-name="T27">t</text:span><text:span text:style-name="T2">o div</text:span><text:span text:style-name="T27">e</text:span><text:span text:style-name="T2"> into ever more detail in a scenario then we could end up with so many events that no progress is made. The OOO idea of withdrawal is also a warning that this is not a good approach </text:span><text:span text:style-name="T10">and</text:span><text:span text:style-name="T2"> what we may be attempting to achieve </text:span><text:span text:style-name="T48">will </text:span><text:span text:style-name="T2">remain just out of reach. </text:span></text:p>
      <text:p text:style-name="P18">Here are some examples of how Events have been used in the scripts:</text:p>
      <text:list text:style-name="L4">
        <text:list-item>
          <text:p text:style-name="P61">In the drops script 2 drops of water collide and form a new drop in the Event called THE_COLLISION.</text:p>
        </text:list-item>
        <text:list-item>
          <text:p text:style-name="P61"><text:span text:style-name="T2">In the golf script the club and ball make contact in an Event which is also called THE_COLLISION and form a new </text:span><text:span text:style-name="T27">compound object</text:span><text:span text:style-name="T2"> called club_ball. </text:span></text:p>
        </text:list-item>
        <text:list-item>
          <text:p text:style-name="P61">In the PoolAndStone script the Event, called STONE_TOUCHES_WATER, is the moment the stone makes contact with the pool of water.</text:p>
        </text:list-item>
      </text:list>
      <text:p text:style-name="P18"><text:span text:style-name="T2">Defining the moment an Event takes plac</text:span><text:span text:style-name="T27">e </text:span><text:span text:style-name="T2">has some similarity with finding a maximum or minimum on a smooth curve without using differentiation. We know there is a maximum and can choose a position on a curve before the maximum and another after. Then by stepping from both directions the length of the curve on which the maximum must be gets shorter and shorter. In a similar way, in the drops script, we know there must be an instant when </text:span><text:span text:style-name="T27">two</text:span><text:span text:style-name="T2"> drops coalesce to form a single drop, but have trouble finding it. and defining the exact timestamp </text:span><text:span text:style-name="T38">as</text:span><text:span text:style-name="T2"> it is likely to have an infinite number of decimals! </text:span></text:p>
      <text:p text:style-name="P18"><text:soft-page-break/><text:span text:style-name="T48">In the scenarios a</text:span><text:span text:style-name="T2">n Event is the vicarious RO which facilitates interaction between objects. </text:span><text:span text:style-name="T17">Difficulties in d</text:span><text:span text:style-name="T2">efining exactly when it happens </text:span><text:span text:style-name="T55">looks like</text:span><text:span text:style-name="T2"> an example of </text:span><text:span text:style-name="T55">the OOO concept of </text:span><text:span text:style-name="T2">withdrawal.</text:span></text:p>
      <text:p text:style-name="P18"><text:span text:style-name="T2"/></text:p>
      <text:p text:style-name="P18"><text:span text:style-name="T2">This approach to time and the introduction of the Event was a consequence of avoiding the simultaneous existence of objects </text:span><text:span text:style-name="T5">which enter an </text:span><text:span text:style-name="T2">Event </text:span><text:span text:style-name="T5">and the modified objects leaving the Event: 2 drops enter THE_COLLISION Event and one coalesced drop leaves it.</text:span><text:span text:style-name="T2"> </text:span></text:p>
      <text:p text:style-name="P18">In some other scenarios very detailed Events may be justified. For example Brownian motion and a drops script with atomisation, instead of coalescence, would be scripted using many Events separated by short Timelines, the assumption being that no <text:span text:style-name="T99">two</text:span> events occur in the same instant. This assumption looks safe enough and was perhaps one of the insights which resulted in the "random walk" and the correct analysis of Brownian Motion by Albert Einstein.</text:p>
      <text:p text:style-name="P22"><text:span text:style-name="T2"/></text:p>
      <text:p text:style-name="P18">What then should the level of detail be in a scenario? </text:p>
      <text:p text:style-name="P22">The division of time into Timelines and instantaneous Events, has the potential for introducing ever more detail. In a similar way other types of object can be split into ever more detail, potentially to atoms and further. When considering inanimate scripts it looks difficult to fix this granularity without slipping an observer into the picture to define the intention of the analysis. An observer could, <text:span text:style-name="T99">for example,</text:span> conclude that there is little point in creating Events for the arrival of every photon on the surface of a pollen particle when looking at Brownian motion. <text:span text:style-name="T2">Events seem also to be associated with a change in the rate of energy transfer </text:span><text:span text:style-name="T38">and t</text:span>he same conclusion is reached by comparing the rate of energy transfer caused by a photon and the collision of a molecule of water with the pollen. Photon collision could influence the motion but is not discernable or relevant.</text:p>
      <text:p text:style-name="P18"><text:span text:style-name="T93">However</text:span> the changes in the structure of objects and step changes in the rate of energy transfer seem to be pointers to a consistent level of granularity. <text:span text:style-name="T27">T</text:span><text:span text:style-name="T2">his emphasise</text:span><text:span text:style-name="T43">s</text:span><text:span text:style-name="T2"> that the OOO concept of withdrawal applies to time objects as well as physical objects. Withdrawal </text:span><text:span text:style-name="T56">can be seen as </text:span><text:span text:style-name="T2">an </text:span><text:span text:style-name="T56">incentive</text:span><text:span text:style-name="T2"> to find</text:span><text:span text:style-name="T56">ing</text:span><text:span text:style-name="T2"> a practical point at which to stop digging deeper in scenarios!</text:span></text:p>
      <text:h text:style-name="P50" text:outline-level="2"><text:bookmark-start text:name="__RefHeading___Toc566_1337968144"/>Compound Objects<text:bookmark-end text:name="__RefHeading___Toc566_1337968144"/></text:h>
      <text:p text:style-name="P18">The last decision in scripting scenarios was how to treat Compound objects. <text:span text:style-name="T28">In </text:span><text:span text:style-name="T56">scenarios</text:span><text:span text:style-name="T28">, </text:span><text:span text:style-name="T2">Compound objects are formed in Events and because an Event is instantaneous </text:span><text:span text:style-name="T27">there can never be more than two objects </text:span><text:span text:style-name="T56">i</text:span><text:span text:style-name="T27">n the </text:span><text:span text:style-name="T56">I</text:span><text:span text:style-name="T27">nput or </text:span><text:span text:style-name="T56">O</text:span><text:span text:style-name="T27">utput </text:span><text:span text:style-name="T56">objects</text:span><text:span text:style-name="T27"> of an Event. </text:span><text:span text:style-name="T2">Compound objects are </text:span><text:span text:style-name="T27">therefore </text:span><text:span text:style-name="T2">always created from </text:span><text:span text:style-name="T27">two</text:span><text:span text:style-name="T2"> objects, which may or may not be Compound objects themselves. </text:span></text:p>
      <text:p text:style-name="P22"><text:span text:style-name="T28">The question which arose was whether </text:span><text:span text:style-name="T2">the new Compound object </text:span><text:span text:style-name="T28">should </text:span><text:span text:style-name="T2">be a new type of object or should one of the 2 objects, let's call it the dominant object, include the other one because the essential nature of the dominant object has not changed? </text:span></text:p>
      <text:p text:style-name="P18">It looks convincing that the Compound drop formed when 2 smaller drops of similar size, coalesce in the drops scenario is a new type of object which contains the original drops. The original 2 drops are mixed into the new drop and the original drops can no longer be recovered. Alternatives, for example, letting drop2 merge into drop1 or the other way around, look arbitrary. <text:span text:style-name="T110">Does that mean </text:span>that any coalescing drops should always form a new drop even when one drop is significantly larger than the other? If this were not the case then an arbitrary, relative size would be needed to establish when the larger drop is so much larger that it absorbs the smaller one.</text:p>
      <text:p text:style-name="P18">In the golf script club and ball both start deforming and energy starts to be transferred at the moment contact is made. It seems reasonable to treat the club and ball as a single new object in the short period they have contact and energy transfer is taking place. Alternatives are to let the club include the ball or the ball the club. </text:p>
      <text:p text:style-name="P18">Again choosing one or the other looks arbitrary and does not improve or simplify the script. </text:p>
      <text:p text:style-name="P18"/>
      <text:p text:style-name="P18">In his book Waves and Stones: On the Ultimate Nature of Reality Graham Harman describes how a stone is thrown into an approaching wave. The Pool and Stone scenario is similar.</text:p>
      <text:p text:style-name="P18">Here is the simplified scenario:</text:p>
      <text:p text:style-name="P18">1. A stone falls through air towards a pool of water. </text:p>
      <text:p text:style-name="P18">2. It touches the water and moves into it until it is fully immersed.</text:p>
      <text:p text:style-name="P18">3. It falls to the bottom of the pool. </text:p>
      <text:p text:style-name="P18">4. Water and air motion caused by the passage of the stone damp out.</text:p>
      <text:p text:style-name="P18"/>
      <text:p text:style-name="P18">By analogy with the drops and golf scripts the water and air objects are defined as the volumes in motion because of the passage of the stone. Here is the above PoolAndStone scenario including these objects:</text:p>
      <text:p text:style-name="P18">1. Before the stone touches the water, the air and stone are a Compound object called stone_air and the water object does not exist. </text:p>
      <text:p text:style-name="P18"><text:soft-page-break/>2. When the stone touches the water, the air SO, water SO and stone form a new Compound object called stone_air_water. </text:p>
      <text:p text:style-name="P18">3. The water SO has no volume when it is created and grows rapidly as the stone moves into and through the water. </text:p>
      <text:p text:style-name="P18">Before contact with the stone, the pool is a continuum. On contact with the stone the water object</text:p>
      <text:p text:style-name="P18">becomes a discrete, increasing, volume as the stone enters and moves through the water. </text:p>
      <text:p text:style-name="P18">4. When the stone is just fully immersed, the air object separates from the Compound and becomes an independent object.</text:p>
      <text:p text:style-name="P18">Objects water and stone continue as a new Compound called stone_water.</text:p>
      <text:p text:style-name="P18">5. The air object begins to shrink as viscosity damps the disturbances caused by the passage of the stone. </text:p>
      <text:p text:style-name="P18">(Interaction between air and water at the water surface and interaction between the air object and the surrounding air are ignored).</text:p>
      <text:p text:style-name="P18">6. Eventually the air is at rest and the air SO has zero volume and ends.</text:p>
      <text:p text:style-name="P18">7. When the stone comes to rest at the bottom of the pool, the stone_water Compound object ends and the water and stone SOs are separate.</text:p>
      <text:p text:style-name="P18"><text:span text:style-name="T104">T</text:span>he stone comes to rest <text:span text:style-name="T104">and the</text:span> water and stone <text:span text:style-name="T105">compound object</text:span> <text:span text:style-name="T105">splits into separate water and stone objects</text:span><text:span text:style-name="T104"> </text:span>because there is no longer interaction between the<text:span text:style-name="T105">m</text:span>, or to put it another way, the stone no longer transfers energy to the water.</text:p>
      <text:p text:style-name="P18">8. The water object begins to shrink as viscosity damps the motion caused by the passage of the stone. </text:p>
      <text:p text:style-name="P18">(Interaction between the water object and the surrounding water has been ignored).</text:p>
      <text:p text:style-name="P18">9. Eventually the water is at rest and the water objects ends: All the water in the pool is again part of the continuum.</text:p>
      <text:p text:style-name="P8"><text:span text:style-name="T2"/></text:p>
      <text:p text:style-name="P38">All Compound objects are 'new' objects <text:span text:style-name="T110">in the PoolAndStone scenario.</text:span> <text:span text:style-name="T110">F</text:span>or example, stone_air is a new object which includes stone and air and stone_air_water is an object which includes stone, air and water, <text:span text:style-name="T105">see the following figure</text:span>. </text:p>
      <text:p text:style-name="P38"/>
      <text:p text:style-name="P38"><draw:frame draw:style-name="fr2" draw:name="Frame10" text:anchor-type="char" svg:width="7.779cm" draw:z-index="18"><draw:text-box fo:min-height="12.485cm"><text:p text:style-name="Figure"><draw:frame draw:style-name="fr6" draw:name="Image10" text:anchor-type="paragraph" svg:x="-0.439cm" svg:y="0.148cm" svg:width="6.766cm" style:rel-width="87%" svg:height="11.342cm" style:rel-height="scale" draw:z-index="19"><draw:image xlink:href="Pictures/100000000000032D00000553B4F780E4.png" xlink:type="simple" xlink:show="embed" xlink:actuate="onLoad" draw:mime-type="image/png"/></draw:frame>Figure <text:sequence text:ref-name="refFigure10" text:name="Figure" text:formula="ooow:Figure+1" style:num-format="1">11</text:sequence>: The Stone touches the Water and the stone_air_water Compound object is created.</text:p></draw:text-box></draw:frame></text:p>
      <text:p text:style-name="P23"/>
      <text:p text:style-name="P23"/>
      <text:p text:style-name="P23"><text:soft-page-break/>The PoolAndStoneObject.txt script is an alternative to the PoolAndStone.txt script and tests the idea of defining a dominant object and merging other objects into it. Instead of making Compound objects, stone_air, stone_air_water, stone_water and stone, the stone is given a 'dominant role'. The stone retains its identity as a stone and air and water are included and excluded as the script progresses. This approach simplifies and feels natural because the stone includes entrained air and water when they are still in contact with the stone. <text:span text:style-name="T93">However</text:span> if the air - water interaction at the surface of the pool were included in the script complications would arise if these damped out after the stone came to rest at the bottom of the pool. In a shallow pool it is likely that energy transfer between water and air, as ripples spread across the pool, is significant after the stone has come to rest. Similar complications occur when trying to make object air or water play a 'leading role'.</text:p>
      <text:p text:style-name="P18">Another approach is to include stone_air as a Compound object in the object stone_air_water. This would lead to problems if properties depend only on air and water or stone and water. </text:p>
      <text:p text:style-name="P18"><text:span text:style-name="T2">This discussion implies that Compound objects should be created by combining other objects to form a new object without any internal hierarchy. This approach </text:span><text:span text:style-name="T6">does not involve decisions on which object is dominant or problems when one object leaves a compound object which may itself be part of another compound object. </text:span><text:span text:style-name="T18">For example ‘a</text:span><text:span text:style-name="T6">ir’ has to leave stone_air_water which is a compound of stone_air and water. </text:span></text:p>
      <text:p text:style-name="P18"><text:span text:style-name="T18">This approach is </text:span><text:span text:style-name="T6">also </text:span><text:span text:style-name="T18">a </text:span><text:span text:style-name="T2">close</text:span><text:span text:style-name="T18">r approach</text:span><text:span text:style-name="T2"> to the OOO idea of a flat ontology.</text:span></text:p>
      <text:p text:style-name="P18"><text:span text:style-name="T2">However this decision comes with a fairly serious objection; a collision between a large drop and an extremely small one must result in a new object and likewise the result of a rain drop falling into a large pool of water must also be a new object. </text:span><text:span text:style-name="T29">OOO seems to suggest that an object could include another object and retain its identity if its essential nature was retained. </text:span><text:span text:style-name="T33">When considering coalescence of water drops t</text:span><text:span text:style-name="T29">his </text:span><text:span text:style-name="T33">seems to </text:span><text:span text:style-name="T29">impl</text:span><text:span text:style-name="T33">y</text:span><text:span text:style-name="T29"> that there is, what looks like an arbitrary boundary, on the </text:span><text:span text:style-name="T33">relative size of </text:span><text:span text:style-name="T29">drops. </text:span></text:p>
      <text:p text:style-name="P19"><text:span text:style-name="T29"/></text:p>
      <text:p text:style-name="P44">A radical approach is to allow Compound objects to contain sensual objects with all combinations of contained objects. </text:p>
      <text:p text:style-name="P10"><text:span text:style-name="T33"/></text:p>
      <text:p text:style-name="P9"><text:span text:style-name="T33">A common practice in OOP is to create 'container' classes around other domain classes, defining interfaces which have to be implemented. This can often lead to information hiding to improve reliability. </text:span><text:span text:style-name="T32">While not supported in the current version of WOOOF t</text:span><text:span text:style-name="T33">hese techniques are appropriate in ensuring that OOO withdrawal is correctly modelled.</text:span></text:p>
      <text:h text:style-name="P53" text:outline-level="2"><text:bookmark-start text:name="__RefHeading___Toc1295_1337968144"/><text:span text:style-name="T77">Bringing it together: drops scenario as a</text:span>n Example<text:bookmark-end text:name="__RefHeading___Toc1295_1337968144"/></text:h>
      <text:p text:style-name="P24">The above points are illustrated using the drops <text:span text:style-name="T76">scenario, see </text:span><text:span text:style-name="T76"><text:sequence-ref text:reference-format="category-and-value" text:ref-name="refFigure0">Figure 1</text:sequence-ref></text:span><text:span text:style-name="T76">, </text:span><text:span text:style-name="T93">which shows </text:span><text:span text:style-name="T76">two drops colliding and then splitting. The following figure shows the WOOOF presentation of the collision. </text:span></text:p>
      <text:p text:style-name="P16"><text:span text:style-name="T77">The first block shows the INIT Event which introduces several object the most important being the two drops. The 2nd block shows the ‘collision’ Timeline which includes SOs drop1 and drop2. These drops include in </text:span><text:span text:style-name="T83">respectively</text:span><text:span text:style-name="T77"> the RO_drop1 and RO_drop2. This point illustrates how the SO surrounds its RO forming a barrier for other objects. </text:span><text:span text:style-name="T100">T</text:span><text:span text:style-name="T77">he ‘collision’ Timeline <text:s/></text:span><text:span text:style-name="T100">shows how the drops move towards each other.</text:span></text:p>
      <text:p text:style-name="P25">The 3rd block shows the COLLISION. RO<text:span text:style-name="T78">_</text:span>COLLISION is included <text:span text:style-name="T83">in </text:span><text:span text:style-name="T110">the SO</text:span><text:span text:style-name="T83"> </text:span>COLLISION and the vicarious causation is shown included in the RO<text:span text:style-name="T83">_</text:span>COLLISION. The INPUT <text:span text:style-name="T79">of the Event</text:span> is drop1 and drop2 and the OUTPUT is bigdrop, an SO which again includes the <text:span text:style-name="T79">newly created</text:span> RO_bigdrop. </text:p>
      <text:p text:style-name="P26"><draw:frame draw:style-name="fr1" draw:name="Frame5" text:anchor-type="char" svg:width="17cm" draw:z-index="8"><draw:text-box fo:min-height="16.72cm"><text:p text:style-name="P5"><draw:frame draw:style-name="fr5" draw:name="Image5" text:anchor-type="paragraph" svg:width="17cm" style:rel-width="100%" svg:height="16.72cm" style:rel-height="scale" draw:z-index="9"><draw:image xlink:href="Pictures/1000000000000407000003F64FEE16B2.png" xlink:type="simple" xlink:show="embed" xlink:actuate="onLoad" draw:mime-type="image/png"/></draw:frame>Figure <text:sequence text:ref-name="refFigure11" text:name="Figure" text:formula="ooow:Figure+1" style:num-format="1">12</text:sequence>: WOOOF output of drops.txt</text:p></draw:text-box></draw:frame><text:soft-page-break/></text:p>
      <text:h text:style-name="P50" text:outline-level="2"><text:bookmark-start text:name="__RefHeading___Toc568_1337968144"/>I<text:span text:style-name="T74">nstantiation</text:span><text:bookmark-end text:name="__RefHeading___Toc568_1337968144"/></text:h>
      <text:p text:style-name="P11"><text:span text:style-name="T2">To close this section a brief discussion of instantiation. Instantiation of a class in OOP can be used for processing data. Consider a class describing an invoice (unique invoice number, date, sender, receiver, a list of products being billed, ...). As each new invoice is created an object is instantiated from the class using parameters </text:span><text:span text:style-name="T43">such as </text:span><text:span text:style-name="T2">invoice number, date, </text:span><text:span text:style-name="T43">sender etc</text:span><text:span text:style-name="T2">. The resulting invoices would all have the structure defined in the class.</text:span></text:p>
      <text:p text:style-name="P40">A similar approach works in OOO. Imagine many pairs of drops colliding and coalescing in a thunder storm and a simplified version of the drops script with only coalescence and no drop splitting. This simplified 'drops' script could be converted into a class with parameters drop sizes, collision time, coordinates, velocities, etc., and could be instantiated for each of the pairs of colliding drops. It is also possible to imagine the output of two of these scripts being used as the input for another, creating a chain reaction of small drops coalescing to form 'rain' drops.</text:p>
      <text:p text:style-name="P8"><text:span text:style-name="T2"/></text:p>
      <text:p text:style-name="P8"><text:span text:style-name="T19">A</text:span><text:span text:style-name="T2">ll objects in the scenarios are essentially static classes meaning they cannot be instantiated or to put it another way they are both a class and a single object.</text:span></text:p>
      <text:h text:style-name="P49" text:outline-level="1"><text:bookmark-start text:name="__RefHeading___Toc538_1337968144"/><text:soft-page-break/>Do the scenarios support OOO?<text:bookmark-end text:name="__RefHeading___Toc538_1337968144"/></text:h>
      <text:h text:style-name="P50" text:outline-level="2"><text:bookmark-start text:name="__RefHeading___Toc570_1337968144"/>Level of Detail and <text:span text:style-name="T73">W</text:span>ithdrawal.<text:bookmark-end text:name="__RefHeading___Toc570_1337968144"/></text:h>
      <text:p text:style-name="P40">The division of time into Timelines and instantaneous Events, has the potential for introducing ever more detail. In a similar way other types of object can be split into ever more detail, potentially to atoms and further. When considering inanimate scripts it looks difficult to fix this granularity without slipping an observer into the picture to define the intention of the analysis. </text:p>
      <text:p text:style-name="P12"><text:span text:style-name="T2"/></text:p>
      <text:p text:style-name="P40">When writing a scenario for Brownian motion there seems little point in creating Events for the arrival of every photon on the surface of a pollen particle. The same conclusion is reached by comparing the rate of energy transfer caused by a photon and the collision of a molecule of water with the pollen.</text:p>
      <text:p text:style-name="P8"><text:span text:style-name="T2"/></text:p>
      <text:p text:style-name="P12"><text:span text:style-name="T2">Th</text:span><text:span text:style-name="T33">ese considerations support </text:span><text:span text:style-name="T2">the OOO idea of withdrawal and that it applies to all objects including the time objects introduced in these scenarios. In a certain sense we could turn the question around, realising that OOO encourages practical scenarios because of its acceptance of withdrawal. </text:span></text:p>
      <text:h text:style-name="P50" text:outline-level="2"><text:bookmark-start text:name="__RefHeading___Toc572_1337968144"/>Timelines and Events. Two types of object?<text:bookmark-end text:name="__RefHeading___Toc572_1337968144"/></text:h>
      <text:p text:style-name="P40">The Timelines have been implemented as SOs and as chunks of time derived (inherited) from the single Real continuous Timeline. This looks logical particularly when Timeline SOs overlap when parallel independent sub-scenarios are part of a scenario. </text:p>
      <text:p text:style-name="P8"><text:span text:style-name="T2">Events are instantaneous </text:span><text:span text:style-name="T32">and can as a consequence involve no more than </text:span><text:span text:style-name="T49">two</text:span><text:span text:style-name="T2"> objects; an exemplary way of avoiding complication. However it does look as though this introduce </text:span><text:span text:style-name="T49">two</text:span><text:span text:style-name="T2"> types of time objects in addition to the single object type proposed by OOO. </text:span></text:p>
      <text:p text:style-name="P8"><text:span text:style-name="T32">T</text:span><text:span text:style-name="T2">he introduction of an Event seems logical and </text:span><text:span text:style-name="T32">even</text:span><text:span text:style-name="T2"> unavoidable. <text:s/></text:span></text:p>
      <text:h text:style-name="P50" text:outline-level="2"><text:bookmark-start text:name="__RefHeading___Toc1297_1337968144"/>A Generic Approach to Inanimate Interactions.<text:bookmark-end text:name="__RefHeading___Toc1297_1337968144"/></text:h>
      <text:p text:style-name="P40">Dividing time into Timeline and Event SOs and the use of less obvious types of SO in the PoolAndStone script both contribute to a generic approach to inanimate interactions. A generic approach supports OOO and could also be a requirement for OOO.</text:p>
      <text:p text:style-name="P8"><text:span text:style-name="T2">In OOP the idea of a Pattern is used to emphasise the generic aspects of similar processes. I think that at an explicit 'OOO' Pattern could be developed and tested again</text:span><text:span text:style-name="T49">st</text:span><text:span text:style-name="T2"> </text:span><text:span text:style-name="T39">many</text:span><text:span text:style-name="T2"> inanimate scenarios. </text:span></text:p>
      <text:h text:style-name="P50" text:outline-level="2"><text:bookmark-start text:name="__RefHeading___Toc574_1337968144"/>Compound Objects.<text:bookmark-end text:name="__RefHeading___Toc574_1337968144"/></text:h>
      <text:p text:style-name="P8"><text:span text:style-name="T2">When </text:span><text:span text:style-name="T49">two</text:span><text:span text:style-name="T2"> or more objects combine a new object should be created without an internal hierarchy. This approach is close to the OOO idea of a flat ontology.</text:span></text:p>
      <text:p text:style-name="P13"><text:span text:style-name="T39">However </text:span><text:span text:style-name="T29">OOO seems to suggest that an object could include another object and retain its identity if its essential nature was retained. </text:span><text:span text:style-name="T33">When considering, </text:span><text:span text:style-name="T46">for example,</text:span><text:span text:style-name="T33"> coalescence of water drops t</text:span><text:span text:style-name="T29">his </text:span><text:span text:style-name="T33">seems to </text:span><text:span text:style-name="T29">impl</text:span><text:span text:style-name="T33">y</text:span><text:span text:style-name="T29"> that there is, what looks like an arbitrary boundary, on the </text:span><text:span text:style-name="T33">relative size of </text:span><text:span text:style-name="T29">drops. </text:span><text:span text:style-name="T33">At some point the resulting drop is not a new one but the large existing one with a small addition.</text:span></text:p>
      <text:h text:style-name="P50" text:outline-level="2"><text:bookmark-start text:name="__RefHeading___Toc576_1337968144"/>Scripts with Observers.<text:bookmark-end text:name="__RefHeading___Toc576_1337968144"/></text:h>
      <text:p text:style-name="P10">A second <text:span text:style-name="T1">type of </text:span><text:span text:style-name="T72">scenario </text:span>introduces two observers, a human and a dog. They both perceive and influence each other and inanimate objects. Parallel sub-scenarios are used to represent a delayed response of the observer to an action taken by the dog and vice versa. The actions of the dog occur in one sub-scenario and the delayed response of the observer in another sub-scenario.</text:p>
      <text:p text:style-name="P16"><text:span text:style-name="T2">The introduction of </text:span><text:span text:style-name="T11">a </text:span><text:span text:style-name="T42">simple</text:span><text:span text:style-name="T11"> model of knowledge</text:span><text:span text:style-name="T2"> in the observers seems justified </text:span><text:span text:style-name="T49">by introspection but also because the processing of objects by observers is inherently more complicated:</text:span><text:span text:style-name="T2"> </text:span><text:span text:style-name="T36">Inanimate interactions/events always involve object collisions, object splitting or object property changes. Observer scenarios involve other types of interaction such as speech acts, responses to sight, smell, sound, feel and also interactions motivated by memory or imagination.</text:span></text:p>
      <text:p text:style-name="P10"><text:span text:style-name="T2"/></text:p>
      <text:p text:style-name="P40">The dog sits then runs and then barks at the same time as running. The human observer only sees the dog when it has started running and then a little later hears it barking.</text:p>
      <text:p text:style-name="P40">The human observer is a separate 'placeholder' with Timelines and Events which mirror the dog Timelines and Events but with a delay to represent the human observer seeing these Events shortly after they have actually occurred. The human observer, the 'placeholder', is called 'Me' in the scenario and what follows.</text:p>
      <text:p text:style-name="P8"><text:span text:style-name="T2"/></text:p>
      <text:p text:style-name="P40">'Me', is used to simulate the delay between something happening and the observer seeing it: </text:p>
      <text:p text:style-name="P8"><text:soft-page-break/><text:span text:style-name="T39">This delay is modelled in </text:span><text:span text:style-name="T2">the human observer </text:span><text:span text:style-name="T39">with the </text:span><text:span text:style-name="T2">following Events, </text:span><text:span text:style-name="T51">see next figure</text:span><text:span text:style-name="T2">:</text:span></text:p>
      <text:p text:style-name="P8"><text:span text:style-name="T2"><text:tab/>S</text:span><text:span text:style-name="T51">EE_SOMETHING</text:span><text:span text:style-name="T2"> black moving.</text:span></text:p>
      <text:p text:style-name="P8"><text:span text:style-name="T2"><text:tab/></text:span><text:span text:style-name="T51">SEE_RUNNING_DOG: </text:span><text:span text:style-name="T2">Identify it as a running dog.</text:span></text:p>
      <text:p text:style-name="P8"><text:span text:style-name="T2"><text:tab/></text:span><text:span text:style-name="T51">SEE_NIDA_RUN: </text:span><text:span text:style-name="T2">Identify it as the dog called Nida.</text:span></text:p>
      <text:p text:style-name="P40"><text:tab/>Change the state/property of 'Today_Nida' to running.</text:p>
      <text:p text:style-name="P8"><text:span text:style-name="T2"/></text:p>
      <text:p text:style-name="P8"><draw:frame draw:style-name="fr1" draw:name="Frame8" text:anchor-type="char" svg:width="17cm" draw:z-index="14"><draw:text-box fo:min-height="6.932cm"><text:p text:style-name="Figure"><draw:frame draw:style-name="fr5" draw:name="Image8" text:anchor-type="paragraph" svg:width="15.81cm" style:rel-width="93%" svg:height="6.445cm" style:rel-height="scale" draw:z-index="15"><draw:image xlink:href="Pictures/10000000000006460000028F1FACF310.png" xlink:type="simple" xlink:show="embed" xlink:actuate="onLoad" draw:mime-type="image/png"/></draw:frame>Figure <text:sequence text:ref-name="refFigure12" text:name="Figure" text:formula="ooow:Figure+1" style:num-format="1">13</text:sequence>: SEE_SOMETHING black moving.</text:p></draw:text-box></draw:frame><text:span text:style-name="T2"/></text:p>
      <text:p text:style-name="P8"><text:span text:style-name="T2"/></text:p>
      <text:p text:style-name="P40">Later the 'Me' object issues a command to sit. The dog interprets the command using a similar series of events and eventually sits.</text:p>
      <text:p text:style-name="P41">The script uses a My_Nida object to captures everything 'Me' already knows about Nida. When 'Me' <text:s/>identifies the dog Nida he creates a new object called Today_Nida which tracks his experiences of Nida on the visit to Bakkeveen (a place in Friesland). Today_Nida is included in My_Nida as well as being a type of My_Nida. </text:p>
      <text:p text:style-name="P17"><draw:frame draw:style-name="fr1" draw:name="Frame9" text:anchor-type="char" svg:width="17cm" draw:z-index="16"><draw:text-box fo:min-height="13.182cm"><text:p text:style-name="Figure"><draw:frame draw:style-name="fr4" draw:name="Image9" text:anchor-type="char" svg:width="17.066cm" svg:height="12.367cm" draw:z-index="17"><draw:image xlink:href="Pictures/10000000000003640000027593AE982B.png" xlink:type="simple" xlink:show="embed" xlink:actuate="onLoad" draw:mime-type="image/png"/></draw:frame>Figure <text:sequence text:ref-name="refFigure13" text:name="Figure" text:formula="ooow:Figure+1" style:num-format="1">14</text:sequence>: My_Nida contains Today_Nida <text:span text:style-name="T103">and </text:span><text:span text:style-name="T102">Today_Nida is a type of My_Nida.</text:span></text:p></draw:text-box></draw:frame><text:soft-page-break/><text:span text:style-name="T2"/></text:p>
      <text:p text:style-name="P40">Inclusion feels correct because the experience of My_Nida on that day are a part of My_Nida but are also separate as they relate to the events of that day. On completion of this part of the scenario My_Nida has retained an encapsulated memory of the days events.</text:p>
      <text:p text:style-name="P40">If I see Nida do something for the first time, for example jump 2 meters into the air, the Today_Nida </text:p>
      <text:p text:style-name="P40">would record this using an Event and I would then update My_Nida, in another Event, with a new property: "can jump 2 meters into the air".</text:p>
      <text:p text:style-name="P40">It looks promising to introduce an observer into the PoolAndStone script. We could imagine an observer anticipating a stone touching the surface of a pool of water and the observer claiming that the event occurred before it did, instead of afterwards. </text:p>
      <text:h text:style-name="P50" text:outline-level="2"><text:bookmark-start text:name="__RefHeading___Toc578_1337968144"/>Object hierarchy inside an Observer.<text:bookmark-end text:name="__RefHeading___Toc578_1337968144"/></text:h>
      <text:p text:style-name="P40">Inside an observer inheritance is used to organise the observers knowledge. An observer has knowledge from direct experience (subjective experience) and knowledge acquired from sources (objective insights) </text:p>
      <text:p text:style-name="P40">such as books, influencers, teachers..... For example I experience a yellow daffodil subjectively</text:p>
      <text:p text:style-name="P40">and I also know that what I call yellow is my way of experiencing a narrow band of wavelengths of the electromagnetic spectrum. Embracing the speculative nature of OOO I am inclined to apply objective insights to interactions. In my case the source would be science while others may rely on magic or the influence of a god. </text:p>
      <text:p text:style-name="P15"><text:span text:style-name="T2">In the dogs script the object 'dog' has properties which apply to all dogs. Storing information about animals which applies to dogs and other animals and information about dogs which applies to any dog, including one called Nida, is an efficient way to store information and makes it available for rapid interpretation of new experiences. I have discussed this with </text:span><text:span text:style-name="T44">a friend </text:span><text:span text:style-name="T2">who </text:span><text:span text:style-name="T44">is an </text:span><text:bookmark text:name="tw-target-text"/><text:span text:style-name="T94">orthopedagogue</text:span><text:span text:style-name="T2">. He </text:span><text:span text:style-name="T52">sees</text:span><text:span text:style-name="T2"> that </text:span><text:span text:style-name="T44">patients with an autistic condition</text:span><text:span text:style-name="T2"> are not able to create these generic objects resulting in confusion if a new dog appears or that they are sometimes unable to use previous knowledge about, for example, a red bus when they see a yellow one.</text:span></text:p>
      <text:p text:style-name="P8"><text:soft-page-break/><text:span text:style-name="T2">I have not been able to find an explicit reference to application of OOO to </text:span><text:span text:style-name="T44">how observer experience </text:span><text:span text:style-name="T2">or a comparison of </text:span><text:span text:style-name="T44">objects </text:span><text:span text:style-name="T2">in- and outside humans in [1] and [2]. However my interpretation of the first part of chapter 3 on the American Civil War in [1] is that</text:span></text:p>
      <text:p text:style-name="P40"><text:tab/>The American Civil War is a RO.</text:p>
      <text:p text:style-name="P40"><text:tab/>Graham Harman has an extensive and detailed SO of that War. </text:p>
      <text:p text:style-name="P40"><text:tab/>He has written a RO which is the first part of chapter 3 of [1] on that War.</text:p>
      <text:p text:style-name="P40"><text:tab/>I had an SO of the War before reading [1], having read some books on the subject.</text:p>
      <text:p text:style-name="P40"><text:tab/>I augmented my American Civil War SO while reading the first part of chapter 3 of [1].</text:p>
      <text:p text:style-name="P40"><text:tab/>I used that knowledge and internet to create the RO scenario called ACW.txt.</text:p>
      <text:p text:style-name="P8"><text:span text:style-name="T2">My conclusion is that OOO accepts that humans have SOs but does not attempt a comparison of SOs in and outside humans. </text:span><text:span text:style-name="T34">W</text:span><text:span text:style-name="T2">hile being highly speculative it is certainly interesting to make this comparison. The attempts discussed in the dogs scenario </text:span><text:span text:style-name="T50">seem to imply </text:span><text:span text:style-name="T2">that abstract parent objects like ‘animal’ and ‘dog’ and interface objects play a role </text:span><text:span text:style-name="T50">one which is not explicit in </text:span><text:span text:style-name="T2">OOO. </text:span><text:span text:style-name="T50">A</text:span><text:span text:style-name="T2">ttempting this step offers ways to analyse knowledge in conscious beings using relatively </text:span><text:span text:style-name="T34">concrete</text:span><text:span text:style-name="T2"> objects and OOO ideas.</text:span></text:p>
      <text:h text:style-name="P47" text:outline-level="1"><text:bookmark-start text:name="__RefHeading___Toc540_1337968144"/>If OOO does describe reality or, at the very least, is a useful analysis tool; what questions arise from its success?<text:bookmark-end text:name="__RefHeading___Toc540_1337968144"/></text:h>
      <text:h text:style-name="P50" text:outline-level="2"><text:bookmark-start text:name="__RefHeading___Toc580_1337968144"/>Why do Objects seem to work outside and inside an observer?<text:bookmark-end text:name="__RefHeading___Toc580_1337968144"/></text:h>
      <text:p text:style-name="P42">Objects outside and inside an observer are both useful for analysing interactions and that raises the question why objects with the similar characteristics should work in both cases? If objects work in an observer while we know that neural networks are the underlying architecture then we could expect a mapping between the networks and objects. Trying to define this mapping looks useful because objects offer an accessible interface for humans while neural networks are often difficult to analyse. </text:p>
      <text:p text:style-name="P14"><text:span text:style-name="T2">The mirror effect of object</text:span><text:span text:style-name="T40">s in several interacting </text:span><text:span text:style-name="T2">observers </text:span><text:span text:style-name="T40">and the mirroring of real external objects in objects in an observer </text:span><text:span text:style-name="T2">lends some credence to the idea that the evolution of observer cognisance has been driven by real objects. </text:span></text:p>
      <text:p text:style-name="P40">In the OOP C# language an "abstract" object, meaning an object which cannot be instantiated, is often used to define functions, properties and interfaces all child objects have (to have). In OOO a real abstract object which is inherited by all real objects will not exist although it may be possible to imagine one. <text:s/>However the OOO idea that real objects interact using different, context sensitive sensual objects is a useful tool for analysis and supports the idea of hidden information in real objects in a natural way. </text:p>
      <text:h text:style-name="P50" text:outline-level="2"><text:bookmark-start text:name="__RefHeading___Toc582_1337968144"/><text:span text:style-name="T4">A</text:span><text:span text:style-name="T2">n 'interface' </text:span><text:span text:style-name="T50">O</text:span><text:span text:style-name="T2">bject which </text:span><text:span text:style-name="T50">O</text:span><text:span text:style-name="T2">bservers use when </text:span><text:span text:style-name="T50">I</text:span><text:span text:style-name="T2">nterpreting </text:span><text:span text:style-name="T50">R</text:span><text:span text:style-name="T2">eality</text:span><text:bookmark-end text:name="__RefHeading___Toc582_1337968144"/></text:h>
      <text:p text:style-name="P8"><text:span text:style-name="T2">A</text:span><text:span text:style-name="T52">n</text:span><text:span text:style-name="T2"> attempt to model </text:span><text:span text:style-name="T35">object processing</text:span><text:span text:style-name="T2"> using an 'interface' object which observers use when interpreting reality, was introduced in the dogs script; for the human and the dog. This type of object could be responsible for 'priming' existing SOs when a new experience occurs. Another comparable object could also be responsible for updating existing SOs if a new property occurs during an experience: see above Nida can "jump 2 meters into the air". It looks improbable that this could work in inanimate objects like a water drop.</text:span></text:p>
      <text:p text:style-name="P43">This seems to suggest that a flat ontology is less likely to apply when including objects within observers.</text:p>
      <text:h text:style-name="P49" text:outline-level="1"><text:bookmark-start text:name="__RefHeading___Toc542_1337968144"/>Conclusion<text:bookmark-end text:name="__RefHeading___Toc542_1337968144"/></text:h>
      <text:p text:style-name="P27"><text:span text:style-name="T84">A l</text:span>imited number of OOO characteristics <text:span text:style-name="T84">have been </text:span>addressed using WOOOF to <text:span text:style-name="T87">write and </text:span>display scenarios representing interactions <text:span text:style-name="T111">between objects</text:span>.</text:p>
      <text:p text:style-name="P31">The <text:span text:style-name="T111">three</text:span> inanimate scenarios <text:span text:style-name="T111">illustrate drop coalescence, a golf club hitting a ball and a stone hitting the surface of a pool and sinking to the bottom of the pool. They </text:span>have a uniform approach to objects, using an interpretation of <text:span text:style-name="T113">some </text:span>OOO ideas. <text:span text:style-name="T111">T</text:span>wo time objects, called Timeline and Event, play a leading role with no explicit parallel in OOO. <text:span text:style-name="T101">T</text:span><text:span text:style-name="T85">he OOO idea of v</text:span><text:span text:style-name="T81">icarious causation us</text:span><text:span text:style-name="T85">es</text:span><text:span text:style-name="T81"> </text:span><text:span text:style-name="T85">the </text:span><text:span text:style-name="T81">instantaneous Event. </text:span></text:p>
      <text:p text:style-name="P31">The Event simplifies scenarios and application to scenarios with many Events such as Brownian motion or atomisation instead of coalescence of water drops, should work because the instantaneous nature of Events ensure that only a maximum of <text:span text:style-name="T101">two</text:span> objects take part in each Event.</text:p>
      <text:p text:style-name="P28"><text:span text:style-name="T84">Finding a</text:span> generic approach to inanimate interactions <text:span text:style-name="T84">looks promising and may lead to a ‘pattern’ </text:span><text:span text:style-name="T101">which can be applied to any inanimate scenario</text:span>.</text:p>
      <text:p text:style-name="P30">The attempts to standardize and simplify Compound object formation and disintegration, ran into a problem with avoidance of an arbitrary ratio of relative size. When should the object formed by a collision be a new object and when should it be a modified version of <text:span text:style-name="T87">one of the </text:span>original object<text:span text:style-name="T87">s</text:span>?</text:p>
      <text:p text:style-name="P30"/>
      <text:p text:style-name="P27"><text:soft-page-break/><text:span text:style-name="T84">Finding </text:span><text:span text:style-name="T85">a practical </text:span>level of detail <text:span text:style-name="T85">in all types of object (inanimate, timeline, Event) is a problem which is always relevant when deciding on a scenario. The OOO idea of withdrawal of real objects is one </text:span><text:span text:style-name="T111">guide to finding a practical </text:span><text:span text:style-name="T85">level of detail in scenarios. <text:s/></text:span></text:p>
      <text:p text:style-name="P62">The <text:span text:style-name="T85">scenarios include a R</text:span><text:span text:style-name="T113">eal </text:span><text:span text:style-name="T85">O</text:span><text:span text:style-name="T113">bject</text:span><text:span text:style-name="T85"> in its S</text:span><text:span text:style-name="T113">ensual </text:span><text:span text:style-name="T85">O</text:span><text:span text:style-name="T113">bject</text:span><text:span text:style-name="T85"> making use of the OOP concept of information hiding to implement withdrawal. </text:span><text:span text:style-name="T86">Testing with a scenario where an </text:span><text:span text:style-name="T85">R</text:span><text:span text:style-name="T113">eal </text:span><text:span text:style-name="T85">O</text:span><text:span text:style-name="T113">bject</text:span><text:span text:style-name="T86"> requires more than one </text:span><text:span text:style-name="T85">S</text:span><text:span text:style-name="T113">ensual </text:span><text:span text:style-name="T85">O</text:span><text:span text:style-name="T113">bject</text:span><text:span text:style-name="T86"> looks like a logical next step.</text:span></text:p>
      <text:p text:style-name="P29">A speculative application of OOO to the processing of objects within an observer <text:span text:style-name="T86">leads to several interesting complications</text:span>. <text:span text:style-name="T86">WOOOF lends itself to showing </text:span>parallel timelines to represent delays between <text:span text:style-name="T85">E</text:span>vents inside and outside observers. <text:span text:style-name="T85">Comparing the observer scenario with the inanimate scenarios emphasises that the latter Events always involve physical interaction, such as collision, while observers have a wider range of communicating. </text:span></text:p>
      <text:p text:style-name="P29"><text:span text:style-name="T86">A rudimentary implementation of knowledge in an observer uses inheritance and adds a new object type containing properties which, for example, apply to all dogs </text:span><text:span text:style-name="T87">or an object animal which applies to all dogs and humans</text:span><text:span text:style-name="T86">.</text:span></text:p>
      <text:p text:style-name="P32">The observer scenario includes two example<text:span text:style-name="T111">s</text:span> of information processing using objects. <text:span text:style-name="T95">These are another example of </text:span>objects <text:span text:style-name="T95">which differ</text:span> from objects rooted in reality <text:span text:style-name="T111">and</text:span> at odds with the OOO idea of a flat ontology.</text:p>
      <text:p text:style-name="P33"><text:span text:style-name="T2"/></text:p>
      <text:p text:style-name="P8"><text:span text:style-name="T2"/></text:p>
      <text:p text:style-name="P8"><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Vet" style:font-family-generic="swiss"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text-properties fo:font-size="10pt" officeooo:rsid="002e4984" style:font-size-asian="10pt" style:font-size-complex="10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top="0.423cm" fo:margin-bottom="0.212cm" style:contextual-spacing="false" fo:text-indent="0cm" style:auto-text-indent="false" text:number-lines="true" text:line-number="0">
        <style:tab-stops/>
      </style:paragraph-properties>
      <style:text-properties style:font-name="Arial" fo:font-family="Arial"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ab-stops>
          <style:tab-stop style:position="17cm" style:type="right" style:leader-style="dotted" style:leader-text="."/>
        </style:tab-stops>
      </style:paragraph-properties>
      <style:text-properties style:font-name="Arial1" fo:font-family="Arial" style:font-style-name="Vet"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size="11pt"/>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cm" fo:margin-right="0cm" fo:margin-top="0.353cm" fo:margin-bottom="0.212cm" style:contextual-spacing="false" fo:text-indent="0cm" style:auto-text-indent="false" fo:background-color="transparent" fo:keep-with-next="always"/>
      <style:text-properties style:font-name="Arial" fo:font-family="Arial" style:font-family-generic="swiss" style:font-pitch="variable" fo:font-size="10pt" fo:font-weight="bold"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2" style:family="paragraph" style:parent-style-name="Heading_20_2" style:default-outline-level="2" style:list-style-name="">
      <loext:graphic-properties draw:fill="none" draw:fill-color="#729fcf"/>
      <style:paragraph-properties fo:margin-left="0cm" fo:margin-right="0cm" fo:margin-top="0.353cm" fo:margin-bottom="0.212cm" style:contextual-spacing="false" fo:text-indent="0cm" style:auto-text-indent="false" fo:background-color="transparent" fo:keep-with-next="always">
        <style:tab-stops/>
      </style:paragraph-properties>
      <style:text-properties style:font-name="Arial" fo:font-family="Arial" style:font-family-generic="swiss" style:font-pitch="variable" fo:font-size="10pt" fo:font-weight="bold" style:font-name-asian="Microsoft YaHei" style:font-family-asian="'Microsoft YaHei'"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fo:font-size="10pt"/>
    </style:style>
    <style:style style:name="Figure" style:family="paragraph" style:parent-style-name="Caption" style:class="extra">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style:font-name="Arial1" fo:font-family="Arial" style:font-style-name="Vet" style:font-family-generic="swiss" style:font-pitch="variable" fo:font-size="14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ize="10pt" style:font-size-asian="10pt" style:font-size-complex="10pt"/>
    </style:style>
    <style:style style:name="List_20_Contents" style:display-name="List Contents" style:family="paragraph" style:parent-style-name="Standard" style:class="html">
      <style:paragraph-properties fo:margin-left="1cm"/>
      <style:text-properties fo:font-size="10pt"/>
    </style:style>
    <style:style style:name="Title" style:family="paragraph" style:parent-style-name="Heading" style:next-style-name="Text_20_body" style:class="chapter">
      <style:paragraph-properties fo:text-align="center" style:justify-single-word="false"/>
      <style:text-properties style:font-name="Arial1" fo:font-family="Arial" style:font-style-name="Vet" style:font-family-generic="swiss" style:font-pitch="variable"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6-29T12:24:30.626000000</meta:creation-date>
    <dc:date>2026-07-07T19:14:01.558000000</dc:date>
    <meta:editing-duration>P2DT22H30M51S</meta:editing-duration>
    <meta:editing-cycles>66</meta:editing-cycles>
    <meta:generator>LibreOffice/24.2.4.2$Windows_X86_64 LibreOffice_project/51a6219feb6075d9a4c46691dcfe0cd9c4fff3c2</meta:generator>
    <meta:print-date>2026-07-06T22:21:38.663000000</meta:print-date>
    <meta:document-statistic meta:table-count="0" meta:image-count="14" meta:object-count="0" meta:page-count="19" meta:paragraph-count="261" meta:word-count="7089" meta:character-count="42133" meta:non-whitespace-character-count="35201"/>
  </office:meta>
</office:document-meta>
</file>